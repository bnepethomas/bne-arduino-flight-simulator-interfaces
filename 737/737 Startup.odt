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Black" svg:font-family="'Arial Black'" style:font-adornments="Regular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 Black" fo:font-size="15pt" fo:font-weight="bold" officeooo:rsid="0007060b" officeooo:paragraph-rsid="0007060b" style:font-size-asian="15pt" style:font-weight-asian="bold" style:font-size-complex="15pt" style:font-weight-complex="bold"/>
    </style:style>
    <style:style style:name="P2" style:family="paragraph" style:parent-style-name="Standard">
      <style:text-properties style:font-name="Arial" officeooo:rsid="0007060b" officeooo:paragraph-rsid="0007060b"/>
    </style:style>
    <style:style style:name="P3" style:family="paragraph" style:parent-style-name="Standard" style:list-style-name="L1">
      <style:text-properties style:font-name="Arial" officeooo:rsid="0007060b" officeooo:paragraph-rsid="0007060b"/>
    </style:style>
    <style:style style:name="P4" style:family="paragraph" style:parent-style-name="Standard" style:list-style-name="L2">
      <style:text-properties style:font-name="Arial" officeooo:rsid="0007060b" officeooo:paragraph-rsid="0007060b"/>
    </style:style>
    <style:style style:name="P5" style:family="paragraph" style:parent-style-name="Standard">
      <style:text-properties style:font-name="Arial" officeooo:rsid="0007060b" officeooo:paragraph-rsid="00094ca0"/>
    </style:style>
    <style:style style:name="P6" style:family="paragraph" style:parent-style-name="Standard">
      <style:text-properties style:font-name="Arial" officeooo:rsid="0007060b" officeooo:paragraph-rsid="000a89ab"/>
    </style:style>
    <style:style style:name="P7" style:family="paragraph" style:parent-style-name="Standard">
      <style:text-properties style:font-name="Arial" officeooo:rsid="0007060b" officeooo:paragraph-rsid="00071dbb"/>
    </style:style>
    <style:style style:name="P8" style:family="paragraph" style:parent-style-name="Standard" style:list-style-name="L3">
      <style:text-properties style:font-name="Arial" officeooo:rsid="0007060b" officeooo:paragraph-rsid="0007060b"/>
    </style:style>
    <style:style style:name="P9" style:family="paragraph" style:parent-style-name="Standard">
      <style:paragraph-properties fo:text-align="center" style:justify-single-word="false" fo:break-before="page"/>
      <style:text-properties style:font-name="Arial" fo:font-size="15pt" fo:font-weight="bold" officeooo:rsid="000876be" officeooo:paragraph-rsid="000876be" style:font-size-asian="15pt" style:font-weight-asian="bold" style:font-size-complex="15pt" style:font-weight-complex="bold"/>
    </style:style>
    <style:style style:name="P10" style:family="paragraph" style:parent-style-name="Standard">
      <style:paragraph-properties fo:text-align="left" style:justify-single-word="false"/>
      <style:text-properties style:font-name="Arial" officeooo:rsid="000876be" officeooo:paragraph-rsid="000876be"/>
    </style:style>
    <style:style style:name="P11" style:family="paragraph" style:parent-style-name="Standard" style:list-style-name="L4">
      <style:paragraph-properties fo:text-align="left" style:justify-single-word="false"/>
      <style:text-properties style:font-name="Arial" officeooo:rsid="000876be" officeooo:paragraph-rsid="000876be"/>
    </style:style>
    <style:style style:name="P12" style:family="paragraph" style:parent-style-name="Standard" style:list-style-name="L5">
      <style:paragraph-properties fo:text-align="left" style:justify-single-word="false"/>
      <style:text-properties style:font-name="Arial" officeooo:rsid="000876be" officeooo:paragraph-rsid="000876be"/>
    </style:style>
    <style:style style:name="P13" style:family="paragraph" style:parent-style-name="Standard" style:list-style-name="L6">
      <style:paragraph-properties fo:text-align="left" style:justify-single-word="false"/>
      <style:text-properties style:font-name="Arial" officeooo:rsid="000876be" officeooo:paragraph-rsid="000876be"/>
    </style:style>
    <style:style style:name="T1" style:family="text">
      <style:text-properties officeooo:rsid="00071dbb"/>
    </style:style>
    <style:style style:name="T2" style:family="text">
      <style:text-properties officeooo:rsid="000771db"/>
    </style:style>
    <style:style style:name="T3" style:family="text">
      <style:text-properties officeooo:rsid="000a89ab"/>
    </style:style>
    <style:style style:name="T4" style:family="text">
      <style:text-properties officeooo:rsid="00094ca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737 Startup</text:p>
      <text:p text:style-name="P2"/>
      <text:p text:style-name="P2">Power on Instructor monitor by window</text:p>
      <text:p text:style-name="P2">Check Fuel cutoff switches are not turned off</text:p>
      <text:p text:style-name="P2"/>
      <text:p text:style-name="P2">Power on cabin</text:p>
      <text:list text:style-name="L1">
        <text:list-item>
          <text:p text:style-name="P3">Check Breaker ok</text:p>
        </text:list-item>
        <text:list-item>
          <text:p text:style-name="P3">Turn on power switch for displays PC</text:p>
        </text:list-item>
        <text:list-item>
          <text:p text:style-name="P3">Turn on Front and Rear PSUs</text:p>
        </text:list-item>
        <text:list-item>
          <text:p text:style-name="P3">Turn on Dome Light</text:p>
        </text:list-item>
      </text:list>
      <text:p text:style-name="P2">Power on Projectors – start projectors with remote. Ensure all projectors have started</text:p>
      <text:p text:style-name="P2">Power on CDU PC</text:p>
      <text:p text:style-name="P2">Power on Primary PC – SIM16 – Windows startup sound should play</text:p>
      <text:p text:style-name="P2">Check <text:span text:style-name="T1">iPhone</text:span> able to play through speakers</text:p>
      <text:p text:style-name="P2"/>
      <text:p text:style-name="P2">Start Trueview</text:p>
      <text:list text:style-name="L2">
        <text:list-item>
          <text:p text:style-name="P4">Enable Desktop warping</text:p>
        </text:list-item>
        <text:list-item>
          <text:p text:style-name="P4">Start P3D</text:p>
        </text:list-item>
        <text:list-item>
          <text:p text:style-name="P4">If no sound once started – resolve</text:p>
        </text:list-item>
      </text:list>
      <text:p text:style-name="P5">Pause until P3D is fully loaded, Mouse to Center of Sim16 view</text:p>
      <text:p text:style-name="P5"/>
      <text:p text:style-name="P2">On CDU PC – bring CDU displays to front using mouse if needed</text:p>
      <text:p text:style-name="P2"/>
      <text:p text:style-name="P6">Start Sim5 Displays <text:span text:style-name="T1">a</text:span><text:span text:style-name="T2">n</text:span><text:span text:style-name="T1">d Sim15.</text:span></text:p>
      <text:p text:style-name="P7"/>
      <text:p text:style-name="P6"><text:span text:style-name="T3">Swap inputs Sim16 to Sim15 using input on monitor. </text:span>On Sim 15</text:p>
      <text:list text:style-name="L3">
        <text:list-item>
          <text:p text:style-name="P8">Wide Client – connected</text:p>
        </text:list-item>
        <text:list-item>
          <text:p text:style-name="P8">Start SOIC – there should be two entries – stop if not present and resolve</text:p>
        </text:list-item>
        <text:list-item>
          <text:p text:style-name="P8">Start Prosim – usually will have error for upper dev<text:span text:style-name="T1">i</text:span>ces, use step ladder, unplug USB and Power for the USB Hub. Connect power, and then USB, should have passenger chime fire</text:p>
        </text:list-item>
        <text:list-item>
          <text:p text:style-name="P8">start Prosim MCP – MCP should update</text:p>
        </text:list-item>
        <text:list-item>
          <text:p text:style-name="P8">Prosim Splitter – check landing gear green and flaps <text:span text:style-name="T1">gauge</text:span> 0</text:p>
        </text:list-item>
        <text:list-item>
          <text:p text:style-name="P8">TQ – connected</text:p>
        </text:list-item>
      </text:list>
      <text:p text:style-name="P2">Check controls movement reflect in MCP system and Flaps respond</text:p>
      <text:p text:style-name="P9">Fault Finding</text:p>
      <text:p text:style-name="P10"/>
      <text:p text:style-name="P10">No Sound – often after 8 minutes</text:p>
      <text:list text:style-name="L4">
        <text:list-item>
          <text:p text:style-name="P11">Full power down</text:p>
        </text:list-item>
        <text:list-item>
          <text:p text:style-name="P11">Windows Control Panel</text:p>
        </text:list-item>
        <text:list-item>
          <text:p text:style-name="P11">Manage Audio Devices</text:p>
        </text:list-item>
        <text:list-item>
          <text:p text:style-name="P11">Speakers Realtek High Def Audio</text:p>
        </text:list-item>
        <text:list-item>
          <text:p text:style-name="P11">Configure – click on Speakers to test</text:p>
        </text:list-item>
        <text:list-item>
          <text:p text:style-name="P11">Restart Prosim as well as loss of flaps control likely</text:p>
        </text:list-item>
      </text:list>
      <text:p text:style-name="P10"/>
      <text:p text:style-name="P10">Single or No devices in SOIC</text:p>
      <text:list text:style-name="L5">
        <text:list-item>
          <text:p text:style-name="P12">Leave SOIC running</text:p>
        </text:list-item>
        <text:list-item>
          <text:p text:style-name="P12">Unplug and plug USB to <text:span text:style-name="T4">Gauges</text:span> on FO side. Do not confuse with Leo Bodnar input card</text:p>
        </text:list-item>
        <text:list-item>
          <text:p text:style-name="P12">Once both devices have appeared shutdown SOIC</text:p>
        </text:list-item>
        <text:list-item>
          <text:p text:style-name="P12">Shutdown wide client</text:p>
        </text:list-item>
        <text:list-item>
          <text:p text:style-name="P12">Restart wide client</text:p>
        </text:list-item>
        <text:list-item>
          <text:p text:style-name="P12">Restart SOIC</text:p>
          <text:p text:style-name="P12"/>
        </text:list-item>
      </text:list>
      <text:p text:style-name="P10">Displays missing from MIP</text:p>
      <text:list text:style-name="L6">
        <text:list-item>
          <text:p text:style-name="P13">Unplug individual monitors on Display PC</text:p>
        </text:list-item>
      </text:list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Black" svg:font-family="'Arial Black'" style:font-adornments="Regular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4.808cm" fo:page-height="21.006cm" style:num-format="1" style:print-orientation="portrait" fo:margin-top="0.762cm" fo:margin-bottom="1.448cm" fo:margin-left="0.635cm" fo:margin-right="0.635cm" fo:border="0.51pt solid #000000" fo:padding="0.10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5-25T10:14:59.189032888</meta:creation-date>
    <dc:date>2026-06-21T13:56:24.340062000</dc:date>
    <meta:editing-duration>PT33M15S</meta:editing-duration>
    <meta:editing-cycles>8</meta:editing-cycles>
    <meta:generator>LibreOffice/26.2.2.2$MacOSX_AARCH64 LibreOffice_project/1f77d10d6938fd34972958f64b2bcfa54f8b1ba5</meta:generator>
    <meta:print-date>2024-05-25T10:46:41.841879709</meta:print-date>
    <meta:document-statistic meta:table-count="0" meta:image-count="0" meta:object-count="0" meta:page-count="2" meta:paragraph-count="45" meta:word-count="316" meta:character-count="1686" meta:non-whitespace-character-count="1427"/>
  </office:meta>
</office:document-meta>
</file>