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apple-system" svg:font-family="apple-system, system-ui, 'Segoe UI', Roboto, 'Helvetica Neue', Arial, sans-serif, 'Apple Color Emoji', 'Segoe UI Emoji', 'Segoe UI Symbol'"/>
  </office:font-face-decls>
  <office:automatic-styles>
    <style:style style:name="Table1" style:family="table">
      <style:table-properties style:width="14.242cm" table:align="left"/>
    </style:style>
    <style:style style:name="Table1.A" style:family="table-column">
      <style:table-column-properties style:column-width="3.42cm"/>
    </style:style>
    <style:style style:name="Table1.B" style:family="table-column">
      <style:table-column-properties style:column-width="1.711cm"/>
    </style:style>
    <style:style style:name="Table1.C" style:family="table-column">
      <style:table-column-properties style:column-width="2.933cm"/>
    </style:style>
    <style:style style:name="Table1.D" style:family="table-column">
      <style:table-column-properties style:column-width="6.17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5">
      <style:text-properties fo:font-variant="normal" fo:text-transform="none" fo:color="#212529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lef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" style:family="paragraph" style:parent-style-name="Heading_20_5">
      <style:paragraph-properties fo:margin-left="0cm" fo:margin-right="0cm" fo:margin-top="0cm" fo:margin-bottom="0.247cm" style:contextual-spacing="false" fo:line-height="120%" fo:text-align="left" style:justify-single-word="false" fo:orphans="2" fo:widows="2" fo:text-indent="0cm" style:auto-text-indent="false"/>
      <style:text-properties fo:font-variant="normal" fo:text-transform="none" fo:color="#212529" loext:opacity="100%" style:font-name="apple-system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lef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Heading_20_2">
      <style:paragraph-properties fo:margin-top="0cm" fo:margin-bottom="0.247cm" style:contextual-spacing="false" fo:line-height="115%"/>
    </style:style>
    <style:style style:name="P14" style:family="paragraph" style:parent-style-name="Preformatted_20_Text">
      <style:paragraph-properties fo:margin-top="0cm" fo:margin-bottom="0.247cm" style:contextual-spacing="false" fo:line-height="115%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 complete C# WinForms example that uses the <text:span text:style-name="Strong_20_Emphasis">FSUIPC Client DLL</text:span> (Paul Henty's managed .NET wrapper, the standard for FSUIPC in C#) to read AirSpeed, Engine Torque, and COM1 Frequency with 100ms updates.</text:p>
      <text:p text:style-name="Text_20_body"/>
      <text:h text:style-name="P1" text:outline-level="5">Using a Project Template to Create a New FSUIPC Application</text:h>
      <text:p text:style-name="P2">The easiest way to get started it to use one of the project templates to create a new FSUIPC project. These are available in the Downloads section of this website. These already have the library linked in and have pre-built connection logic and a basic timer for getting real-time data from FSUIPC.</text:p>
      <text:h text:style-name="P3" text:outline-level="5">Installing the Library into an Existing Project</text:h>
      <text:p text:style-name="P2">To install the library into an existing application you must install a NuGet package called FSUIPCClientDLL. Use the NuGet Package Manager in Visual Studio to install it into your project and keep up-to-date:</text:p>
      <text:list text:style-name="L1">
        <text:list-item>
          <text:p text:style-name="P4">Open the NuGet Package Manager for the Solution in Visual Studio:</text:p>
          <text:list>
            <text:list-item>
              <text:p text:style-name="P5">Either: TOOLS -&gt; NuGet Package Manager -&gt; Manage NuGet Packages for Solution...</text:p>
            </text:list-item>
            <text:list-item>
              <text:p text:style-name="P5">Or: Right-click on the Solution node in the Solution Explorer, then select [Manage NuGet Packages for Solution...] from the shortcut menu</text:p>
            </text:list-item>
          </text:list>
        </text:list-item>
        <text:list-item>
          <text:p text:style-name="P4">At the top of the [NuGet - Solution] tab, select the Browse page</text:p>
        </text:list-item>
        <text:list-item>
          <text:p text:style-name="P4">In the Search box type FSUIPC. It should find the package called FSUIPCClientDLL by phenty</text:p>
        </text:list-item>
        <text:list-item>
          <text:p text:style-name="P4">If you want to be able to install beta versions tick the box [include prerelease] next to the search box</text:p>
        </text:list-item>
        <text:list-item>
          <text:p text:style-name="P4">Click on the package</text:p>
        </text:list-item>
        <text:list-item>
          <text:p text:style-name="P4">In the right-hand pane a list of projects will appear. Tick the project(s) you want to install the library into</text:p>
        </text:list-item>
        <text:list-item>
          <text:p text:style-name="P4">By default the latest version is selected</text:p>
        </text:list-item>
        <text:list-item>
          <text:p text:style-name="P4">Press the install button. The DLL will be downloaded and added as a reference in your project</text:p>
        </text:list-item>
        <text:list-item>
          <text:p text:style-name="P4">Close the Nuget window</text:p>
        </text:list-item>
      </text:list>
      <text:p text:style-name="Text_20_body"/>
      <text:h text:style-name="Heading_20_2" text:outline-level="2">Prerequisites</text:h>
      <text:list text:style-name="L2">
        <text:list-item>
          <text:p text:style-name="P6"><text:span text:style-name="Strong_20_Emphasis">FSUIPC</text:span> installed in your flight simulator (FSX/P3D/MSFS). </text:p>
        </text:list-item>
        <text:list-item>
          <text:p text:style-name="P6"><text:span text:style-name="Strong_20_Emphasis">FSUIPCClient.dll</text:span> — download the .NET Client DLL from <text:a xlink:type="simple" xlink:href="http://www.paulhenty.com/fsuipc.php" office:target-frame-name="_blank" xlink:show="new" text:style-name="Internet_20_link" text:visited-style-name="Visited_20_Internet_20_Link">Paul Henty's site</text:a>. Add it as a reference to your project. </text:p>
        </text:list-item>
        <text:list-item>
          <text:p text:style-name="P7"><text:soft-page-break/>A <text:span text:style-name="Strong_20_Emphasis">WinForms</text:span> project targeting .NET Framework 4.x (the DLL is built for .NET Framework). </text:p>
        </text:list-item>
      </text:list>
      <text:h text:style-name="Heading_20_2" text:outline-level="2">The Offsets Used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alue</text:p>
            </table:table-cell>
            <table:table-cell table:style-name="Table1.A1" office:value-type="string">
              <text:p text:style-name="Table_20_Heading">Offset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Indicated Airspeed</text:p>
          </table:table-cell>
          <table:table-cell table:style-name="Table1.A1" office:value-type="string">
            <text:p text:style-name="Table_20_Contents"><text:span text:style-name="Source_20_Text">0x02BC</text:span></text:p>
          </table:table-cell>
          <table:table-cell table:style-name="Table1.A1" office:value-type="string">
            <text:p text:style-name="Table_20_Contents">int (4 bytes)</text:p>
          </table:table-cell>
          <table:table-cell table:style-name="Table1.A1" office:value-type="string">
            <text:p text:style-name="Table_20_Contents">Knots × 128</text:p>
          </table:table-cell>
        </table:table-row>
        <table:table-row>
          <table:table-cell table:style-name="Table1.A1" office:value-type="string">
            <text:p text:style-name="Table_20_Contents">Engine 1 Torque</text:p>
          </table:table-cell>
          <table:table-cell table:style-name="Table1.A1" office:value-type="string">
            <text:p text:style-name="Table_20_Contents"><text:span text:style-name="Source_20_Text">0x2000</text:span></text:p>
          </table:table-cell>
          <table:table-cell table:style-name="Table1.A1" office:value-type="string">
            <text:p text:style-name="Table_20_Contents">double (8 bytes)</text:p>
          </table:table-cell>
          <table:table-cell table:style-name="Table1.A1" office:value-type="string">
            <text:p text:style-name="Table_20_Contents">% (turbine engines, FS gauges)</text:p>
          </table:table-cell>
        </table:table-row>
        <table:table-row>
          <table:table-cell table:style-name="Table1.A1" office:value-type="string">
            <text:p text:style-name="Table_20_Contents">COM1 Frequency</text:p>
          </table:table-cell>
          <table:table-cell table:style-name="Table1.A1" office:value-type="string">
            <text:p text:style-name="Table_20_Contents"><text:span text:style-name="Source_20_Text">0x034E</text:span></text:p>
          </table:table-cell>
          <table:table-cell table:style-name="Table1.A1" office:value-type="string">
            <text:p text:style-name="Table_20_Contents">short (2 bytes)</text:p>
          </table:table-cell>
          <table:table-cell table:style-name="Table1.A1" office:value-type="string">
            <text:p text:style-name="Table_20_Contents">BCD, e.g. <text:span text:style-name="Source_20_Text">0x2735</text:span> = 127.35 MHz</text:p>
          </table:table-cell>
        </table:table-row>
      </table:table>
      <text:p text:style-name="Quotations"><text:span text:style-name="Strong_20_Emphasis">Note:</text:span> Engine torque offsets vary by simulator/model. <text:span text:style-name="Source_20_Text">0x2000</text:span> is a common turbine torque offset, but you may need to adjust based on your aircraft/sim documentation.</text:p>
      <text:h text:style-name="Heading_20_2" text:outline-level="2">Form Code</text:h>
      <text:p text:style-name="Text_20_body">Create a form with three <text:span text:style-name="Source_20_Text">Label</text:span> controls (<text:span text:style-name="Source_20_Text">lblAirspeed</text:span>, <text:span text:style-name="Source_20_Text">lblTorque</text:span>, <text:span text:style-name="Source_20_Text">lblCom1</text:span>) and a <text:span text:style-name="Source_20_Text">Timer</text:span>.</text:p>
      <text:p text:style-name="Preformatted_20_Text"><text:span text:style-name="Source_20_Text">using System;</text:span></text:p>
      <text:p text:style-name="Preformatted_20_Text"><text:span text:style-name="Source_20_Text">using System.Windows.Forms;</text:span></text:p>
      <text:p text:style-name="Preformatted_20_Text"><text:span text:style-name="Source_20_Text">using FSUIPC;</text:span></text:p>
      <text:p text:style-name="Preformatted_20_Text"/>
      <text:p text:style-name="Preformatted_20_Text"><text:span text:style-name="Source_20_Text">namespace FsuipcReader</text:span></text:p>
      <text:p text:style-name="Preformatted_20_Text"><text:span text:style-name="Source_20_Text">{</text:span></text:p>
      <text:p text:style-name="Preformatted_20_Text"><text:span text:style-name="Source_20_Text"><text:s text:c="4"/>public partial class MainForm : For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Declare the offsets we want to read</text:span></text:p>
      <text:p text:style-name="Preformatted_20_Text"><text:span text:style-name="Source_20_Text"><text:s text:c="8"/>private readonly Offset&lt;int&gt; _airspeed = new Offset&lt;int&gt;(0x02BC); <text:s text:c="5"/>// IAS: knots * 128</text:span></text:p>
      <text:p text:style-name="Preformatted_20_Text"><text:span text:style-name="Source_20_Text"><text:s text:c="8"/>private readonly Offset&lt;double&gt; _torque = new Offset&lt;double&gt;(0x2000); <text:s/>// Engine 1 torque (%)</text:span></text:p>
      <text:p text:style-name="Preformatted_20_Text"><text:span text:style-name="Source_20_Text"><text:s text:c="8"/>private readonly Offset&lt;short&gt; _com1 = new Offset&lt;short&gt;(0x034E); <text:s text:c="5"/>// COM1 freq (BCD)</text:span></text:p>
      <text:p text:style-name="Preformatted_20_Text"/>
      <text:p text:style-name="Preformatted_20_Text"><text:span text:style-name="Source_20_Text"><text:s text:c="8"/>private readonly Timer _timer = new Timer();</text:span></text:p>
      <text:p text:style-name="Preformatted_20_Text"/>
      <text:p text:style-name="Preformatted_20_Text"><text:span text:style-name="Source_20_Text"><text:s text:c="8"/>public MainForm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nitializeComponent();</text:span></text:p>
      <text:p text:style-name="Preformatted_20_Text"/>
      <text:p text:style-name="Preformatted_20_Text"><text:span text:style-name="Source_20_Text"><text:s text:c="12"/>_timer.Interval = 100; // 100 ms update rate</text:span></text:p>
      <text:p text:style-name="Preformatted_20_Text"><text:span text:style-name="Source_20_Text"><text:s text:c="12"/>_timer.Tick += Timer_Tic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otected override void OnLoad(EventArgs 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OnLoad(e);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Open connection to FSUIPC (auto-detects sim version)</text:span></text:p>
      <text:p text:style-name="Preformatted_20_Text"><text:span text:style-name="Source_20_Text"><text:s text:c="16"/>FSUIPCConnection.Open();</text:span></text:p>
      <text:p text:style-name="Preformatted_20_Text"><text:span text:style-name="Source_20_Text"><text:s text:c="16"/>_timer.Start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 (Exception ex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MessageBox.Show("Could not connect to FSUIPC.\n\n" + ex.Message,</text:span></text:p>
      <text:p text:style-name="Preformatted_20_Text"><text:span text:style-name="Source_20_Text"><text:s text:c="20"/>"Connection Error", MessageBoxButtons.OK, MessageBoxIcon.Error);</text:span></text:p>
      <text:p text:style-name="Preformatted_20_Text"><text:span text:style-name="Source_20_Text"><text:s text:c="12"/>}</text:span></text:p>
      <text:p text:style-name="Preformatted_20_Text"><text:soft-page-break/><text:span text:style-name="Source_20_Text"><text:s text:c="8"/>}</text:span></text:p>
      <text:p text:style-name="Preformatted_20_Text"/>
      <text:p text:style-name="Preformatted_20_Text"><text:span text:style-name="Source_20_Text"><text:s text:c="8"/>private void Timer_Tick(object sender, EventArgs 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Read the latest values from FSUIPC into our offsets</text:span></text:p>
      <text:p text:style-name="Preformatted_20_Text"><text:span text:style-name="Source_20_Text"><text:s text:c="16"/>FSUIPCConnection.Process();</text:span></text:p>
      <text:p text:style-name="Preformatted_20_Text"/>
      <text:p text:style-name="Preformatted_20_Text"><text:span text:style-name="Source_20_Text"><text:s text:c="16"/>// --- Airspeed: raw value is knots * 128 ---</text:span></text:p>
      <text:p text:style-name="Preformatted_20_Text"><text:span text:style-name="Source_20_Text"><text:s text:c="16"/>double airspeedKnots = _airspeed.Value / 128.0;</text:span></text:p>
      <text:p text:style-name="Preformatted_20_Text"/>
      <text:p text:style-name="Preformatted_20_Text"><text:span text:style-name="Source_20_Text"><text:s text:c="16"/>// --- Engine Torque: already a percentage ---</text:span></text:p>
      <text:p text:style-name="Preformatted_20_Text"><text:span text:style-name="Source_20_Text"><text:s text:c="16"/>double torquePercent = _torque.Value;</text:span></text:p>
      <text:p text:style-name="Preformatted_20_Text"/>
      <text:p text:style-name="Preformatted_20_Text"><text:span text:style-name="Source_20_Text"><text:s text:c="16"/>// --- COM1 Frequency: stored as BCD, e.g. 0x2735 -&gt; 127.35 ---</text:span></text:p>
      <text:p text:style-name="Preformatted_20_Text"><text:span text:style-name="Source_20_Text"><text:s text:c="16"/>double com1Freq = ConvertBcdComFrequency(_com1.Value);</text:span></text:p>
      <text:p text:style-name="Preformatted_20_Text"/>
      <text:p text:style-name="Preformatted_20_Text"><text:span text:style-name="Source_20_Text"><text:s text:c="16"/>// Update the UI</text:span></text:p>
      <text:p text:style-name="Preformatted_20_Text"><text:span text:style-name="Source_20_Text"><text:s text:c="16"/>lblAirspeed.Text = $"Airspeed: <text:s/>{airspeedKnots:F1} kt";</text:span></text:p>
      <text:p text:style-name="Preformatted_20_Text"><text:span text:style-name="Source_20_Text"><text:s text:c="16"/>lblTorque.Text <text:s text:c="2"/>= $"Torque: <text:s text:c="3"/>{torquePercent:F1} %";</text:span></text:p>
      <text:p text:style-name="Preformatted_20_Text"><text:span text:style-name="Source_20_Text"><text:s text:c="16"/>lblCom1.Text <text:s text:c="4"/>= $"COM1: <text:s text:c="5"/>{com1Freq:F3} MHz"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 (Exception ex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timer.Stop();</text:span></text:p>
      <text:p text:style-name="Preformatted_20_Text"><text:span text:style-name="Source_20_Text"><text:s text:c="16"/>MessageBox.Show("Error reading from FSUIPC.\n\n" + ex.Message,</text:span></text:p>
      <text:p text:style-name="Preformatted_20_Text"><text:span text:style-name="Source_20_Text"><text:s text:c="20"/>"Read Error", MessageBoxButtons.OK, MessageBoxIcon.Error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/ &lt;summary&gt;</text:span></text:p>
      <text:p text:style-name="Preformatted_20_Text"><text:span text:style-name="Source_20_Text"><text:s text:c="8"/>/// COM frequencies are stored as BCD without the leading "1".</text:span></text:p>
      <text:p text:style-name="Preformatted_20_Text"><text:span text:style-name="Source_20_Text"><text:s text:c="8"/>/// Example: raw 0x2735 -&gt; "2735" -&gt; 127.35 MHz</text:span></text:p>
      <text:p text:style-name="Preformatted_20_Text"><text:span text:style-name="Source_20_Text"><text:s text:c="8"/>/// &lt;/summary&gt;</text:span></text:p>
      <text:p text:style-name="Preformatted_20_Text"><text:span text:style-name="Source_20_Text"><text:s text:c="8"/>private static double ConvertBcdComFrequency(short raw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Interpret the short as a 4-digit hex/BCD string</text:span></text:p>
      <text:p text:style-name="Preformatted_20_Text"><text:span text:style-name="Source_20_Text"><text:s text:c="12"/>string bcd = raw.ToString("X4");</text:span></text:p>
      <text:p text:style-name="Preformatted_20_Text"><text:span text:style-name="Source_20_Text"><text:s text:c="12"/>// Frequencies are 1XX.XX, so prefix with "1"</text:span></text:p>
      <text:p text:style-name="Preformatted_20_Text"><text:span text:style-name="Source_20_Text"><text:s text:c="12"/>double freq = double.Parse("1" + bcd) / 100.0;</text:span></text:p>
      <text:p text:style-name="Preformatted_20_Text"><text:span text:style-name="Source_20_Text"><text:s text:c="12"/>return freq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otected override void OnFormClosing(FormClosingEventArgs 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timer.Stop();</text:span></text:p>
      <text:p text:style-name="Preformatted_20_Text"><text:span text:style-name="Source_20_Text"><text:s text:c="12"/>if (FSUIPCConnection.IsOpen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FSUIPCConnection.Close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base.OnFormClosing(e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8"><text:span text:style-name="Source_20_Text">}</text:span></text:p>
      <text:h text:style-name="Heading_20_2" text:outline-level="2">Minimal Designer Setup (if not using the designer)</text:h>
      <text:p text:style-name="Text_20_body">If you'd rather build the UI in code, add this to the constructor after <text:span text:style-name="Source_20_Text">InitializeComponent()</text:span>:</text:p>
      <text:p text:style-name="Preformatted_20_Text"><text:span text:style-name="Source_20_Text">this.Text = "FSUIPC Reader";</text:span></text:p>
      <text:p text:style-name="Preformatted_20_Text"><text:span text:style-name="Source_20_Text">this.ClientSize = new System.Drawing.Size(300, 130);</text:span></text:p>
      <text:p text:style-name="Preformatted_20_Text"><text:soft-page-break/></text:p>
      <text:p text:style-name="Preformatted_20_Text"><text:span text:style-name="Source_20_Text">lblAirspeed = new Label { Location = new System.Drawing.Point(15, 15), AutoSize = true, Font = new System.Drawing.Font("Consolas", 12) };</text:span></text:p>
      <text:p text:style-name="Preformatted_20_Text"><text:span text:style-name="Source_20_Text">lblTorque <text:s text:c="2"/>= new Label { Location = new System.Drawing.Point(15, 50), AutoSize = true, Font = new System.Drawing.Font("Consolas", 12) };</text:span></text:p>
      <text:p text:style-name="Preformatted_20_Text"><text:span text:style-name="Source_20_Text">lblCom1 <text:s text:c="4"/>= new Label { Location = new System.Drawing.Point(15, 85), AutoSize = true, Font = new System.Drawing.Font("Consolas", 12) };</text:span></text:p>
      <text:p text:style-name="Preformatted_20_Text"/>
      <text:p text:style-name="P8"><text:span text:style-name="Source_20_Text">this.Controls.AddRange(new Control[] { lblAirspeed, lblTorque, lblCom1 });</text:span></text:p>
      <text:h text:style-name="Heading_20_2" text:outline-level="2">Key Points</text:h>
      <text:list text:style-name="L3">
        <text:list-item>
          <text:p text:style-name="P9"><text:span text:style-name="Strong_20_Emphasis"><text:span text:style-name="Source_20_Text">FSUIPCConnection.Process()</text:span></text:span> is the call that actually exchanges data with the sim — do this every timer tick. </text:p>
        </text:list-item>
        <text:list-item>
          <text:p text:style-name="P9">The <text:span text:style-name="Source_20_Text">System.Windows.Forms.Timer</text:span> runs on the UI thread, so it's safe to update labels directly. For higher precision or heavier loads, consider a <text:span text:style-name="Source_20_Text">System.Threading.Timer</text:span> with <text:span text:style-name="Source_20_Text">Invoke</text:span> marshaling. </text:p>
        </text:list-item>
        <text:list-item>
          <text:p text:style-name="P10"><text:span text:style-name="Strong_20_Emphasis">Verify offsets</text:span> against the official FSUIPC Offset Status document (installed with FSUIPC), since some values — especially torque — differ between aircraft and simulator versions. </text:p>
        </text:list-item>
      </text:list>
      <text:h text:style-name="Heading_20_2" text:outline-level="2">Things to Double-Check</text:h>
      <text:list text:style-name="L4">
        <text:list-item>
          <text:p text:style-name="P11"><text:span text:style-name="Strong_20_Emphasis">Torque offset (</text:span><text:span text:style-name="Strong_20_Emphasis"><text:span text:style-name="Source_20_Text">0x2000</text:span></text:span><text:span text:style-name="Strong_20_Emphasis">)</text:span>: Confirm the correct offset for your specific aircraft. Some models expose torque via <text:span text:style-name="Source_20_Text">0x0870</text:span>-range engine offsets or need Lua/lvar bridging (especially in MSFS). </text:p>
        </text:list-item>
        <text:list-item>
          <text:p text:style-name="P12"><text:span text:style-name="Strong_20_Emphasis">MSFS users</text:span>: You'll need the newer FSUIPC7 and its matching Client DLL version. </text:p>
        </text:list-item>
      </text:list>
      <text:p text:style-name="Text_20_body">Would you like me to extend this with logging, a second engine, or a WPF version instead?</text:p>
      <text:p text:style-name="Text_20_body"/>
      <text:p text:style-name="Text_20_body">Here's the updated code. Since you have <text:span text:style-name="Strong_20_Emphasis">21 bits</text:span> (BIT 0 through BIT 20), the offset needs to be read as an 8-byte value (<text:span text:style-name="Source_20_Text">long</text:span>) — a 16-bit <text:span text:style-name="Source_20_Text">short</text:span> or 32-bit <text:span text:style-name="Source_20_Text">int</text:span> wouldn't cover it. Reading <text:span text:style-name="Source_20_Text">0x2F28</text:span> as an <text:span text:style-name="Source_20_Text">Offset&lt;long&gt;</text:span> gives you all 64 bits, of which you're using the lowest 21.</text:p>
      <text:h text:style-name="P13" text:outline-level="2">Updated Offsets</text:h>
      <text:p text:style-name="P14"><text:span text:style-name="Source_20_Text">using System;</text:span></text:p>
      <text:p text:style-name="P14"><text:span text:style-name="Source_20_Text">using System.Collections.Generic;</text:span></text:p>
      <text:p text:style-name="P14"><text:span text:style-name="Source_20_Text">using System.Windows.Forms;</text:span></text:p>
      <text:p text:style-name="P14"><text:span text:style-name="Source_20_Text">using FSUIPC;</text:span></text:p>
      <text:p text:style-name="P14"/>
      <text:p text:style-name="P14"><text:span text:style-name="Source_20_Text">namespace FsuipcReader</text:span></text:p>
      <text:p text:style-name="P14"><text:span text:style-name="Source_20_Text">{</text:span></text:p>
      <text:p text:style-name="P14"><text:span text:style-name="Source_20_Text"><text:s text:c="4"/>public partial class MainForm : Form</text:span></text:p>
      <text:p text:style-name="P14"><text:span text:style-name="Source_20_Text"><text:s text:c="4"/>{</text:span></text:p>
      <text:p text:style-name="P14"><text:span text:style-name="Source_20_Text"><text:s text:c="8"/>// --- Existing offsets ---</text:span></text:p>
      <text:p text:style-name="P14"><text:soft-page-break/><text:span text:style-name="Source_20_Text"><text:s text:c="8"/>private readonly Offset&lt;int&gt; _airspeed = new Offset&lt;int&gt;(0x02BC); <text:s text:c="5"/>// IAS: knots * 128</text:span></text:p>
      <text:p text:style-name="P14"><text:span text:style-name="Source_20_Text"><text:s text:c="8"/>private readonly Offset&lt;double&gt; _torque = new Offset&lt;double&gt;(0x2000); <text:s/>// Engine 1 torque (%)</text:span></text:p>
      <text:p text:style-name="P14"><text:span text:style-name="Source_20_Text"><text:s text:c="8"/>private readonly Offset&lt;short&gt; _com1 = new Offset&lt;short&gt;(0x034E); <text:s text:c="5"/>// COM1 freq (BCD)</text:span></text:p>
      <text:p text:style-name="P14"/>
      <text:p text:style-name="P14"><text:span text:style-name="Source_20_Text"><text:s text:c="8"/>// --- New: 8-byte annunciator bit pattern ---</text:span></text:p>
      <text:p text:style-name="P14"><text:span text:style-name="Source_20_Text"><text:s text:c="8"/>private readonly Offset&lt;long&gt; _annunciators = new Offset&lt;long&gt;(0x2F28);</text:span></text:p>
      <text:p text:style-name="P14"/>
      <text:p text:style-name="P14"><text:span text:style-name="Source_20_Text"><text:s text:c="8"/>private readonly Timer _timer = new Timer();</text:span></text:p>
      <text:p text:style-name="P14"/>
      <text:p text:style-name="P14"><text:span text:style-name="Source_20_Text"><text:s text:c="8"/>// A ListView or set of labels to show the light states</text:span></text:p>
      <text:p text:style-name="P14"><text:span text:style-name="Source_20_Text"><text:s text:c="8"/>private ListView _lightList;</text:span></text:p>
      <text:h text:style-name="P13" text:outline-level="2">Bit Definitions</text:h>
      <text:p text:style-name="Text_20_body">Define the bit map once, so the display stays in sync with the source:</text:p>
      <text:p text:style-name="P14"><text:span text:style-name="Source_20_Text"><text:s text:c="8"/>// Bit index -&gt; annunciator name (as documented for offset 0x2F28)</text:span></text:p>
      <text:p text:style-name="P14"><text:span text:style-name="Source_20_Text"><text:s text:c="8"/>private static readonly (int Bit, string Name)[] AnnunciatorBits =</text:span></text:p>
      <text:p text:style-name="P14"><text:span text:style-name="Source_20_Text"><text:s text:c="8"/>{</text:span></text:p>
      <text:p text:style-name="P14"><text:span text:style-name="Source_20_Text"><text:s text:c="12"/>(0, <text:s/>"ENG_OUT"),</text:span></text:p>
      <text:p text:style-name="P14"><text:span text:style-name="Source_20_Text"><text:s text:c="12"/>(1, <text:s/>"ROTOR_LOW"),</text:span></text:p>
      <text:p text:style-name="P14"><text:span text:style-name="Source_20_Text"><text:s text:c="12"/>(2, <text:s/>"FUEL_LOW"),</text:span></text:p>
      <text:p text:style-name="P14"><text:span text:style-name="Source_20_Text"><text:s text:c="12"/>(3, <text:s/>"GENERATOR_FAIL"),</text:span></text:p>
      <text:p text:style-name="P14"><text:span text:style-name="Source_20_Text"><text:s text:c="12"/>(4, <text:s/>"BATTERY_WARM"),</text:span></text:p>
      <text:p text:style-name="P14"><text:span text:style-name="Source_20_Text"><text:s text:c="12"/>(5, <text:s/>"BATTERY_HOT"),</text:span></text:p>
      <text:p text:style-name="P14"><text:span text:style-name="Source_20_Text"><text:s text:c="12"/>(6, <text:s/>"FUEL_PUMP_FAIL"),</text:span></text:p>
      <text:p text:style-name="P14"><text:span text:style-name="Source_20_Text"><text:s text:c="12"/>(7, <text:s/>"TRANSMISSION_PRESSURE_FAIL"),</text:span></text:p>
      <text:p text:style-name="P14"><text:span text:style-name="Source_20_Text"><text:s text:c="12"/>(8, <text:s/>"TRANSMISSION_TEMPERATURE_FAIL"),</text:span></text:p>
      <text:p text:style-name="P14"><text:span text:style-name="Source_20_Text"><text:s text:c="12"/>(9, <text:s/>"ENGINE_CHIP"),</text:span></text:p>
      <text:p text:style-name="P14"><text:span text:style-name="Source_20_Text"><text:s text:c="12"/>(10, "TAIL_ROTOR_CHIP"),</text:span></text:p>
      <text:p text:style-name="P14"><text:span text:style-name="Source_20_Text"><text:s text:c="12"/>(11, "TRANSMISSION_CHIP"),</text:span></text:p>
      <text:p text:style-name="P14"><text:span text:style-name="Source_20_Text"><text:s text:c="12"/>(12, "FUEL_FILTER_FAIL"),</text:span></text:p>
      <text:p text:style-name="P14"><text:span text:style-name="Source_20_Text"><text:s text:c="12"/>(13, "BAGGAGE_DOOR"),</text:span></text:p>
      <text:p text:style-name="P14"><text:span text:style-name="Source_20_Text"><text:s text:c="12"/>(14, "SIMCONNECT_FAIL"),</text:span></text:p>
      <text:p text:style-name="P14"><text:span text:style-name="Source_20_Text"><text:s text:c="12"/>(15, "SPARE_1"),</text:span></text:p>
      <text:p text:style-name="P14"><text:span text:style-name="Source_20_Text"><text:s text:c="12"/>(16, "SPARE_2"),</text:span></text:p>
      <text:p text:style-name="P14"><text:span text:style-name="Source_20_Text"><text:s text:c="12"/>(17, "SPARE_3"),</text:span></text:p>
      <text:p text:style-name="P14"><text:soft-page-break/><text:span text:style-name="Source_20_Text"><text:s text:c="12"/>(18, "SPARE_4"),</text:span></text:p>
      <text:p text:style-name="P14"><text:span text:style-name="Source_20_Text"><text:s text:c="12"/>(19, "SPARE_5"),</text:span></text:p>
      <text:p text:style-name="P14"><text:span text:style-name="Source_20_Text"><text:s text:c="12"/>(20, "TURBINE_OVER_TEMP_LIGHT"),</text:span></text:p>
      <text:p text:style-name="P14"><text:span text:style-name="Source_20_Text"><text:s text:c="8"/>};</text:span></text:p>
      <text:h text:style-name="P13" text:outline-level="2">Building the Light Display</text:h>
      <text:p text:style-name="Text_20_body">Add this to your constructor (after <text:span text:style-name="Source_20_Text">InitializeComponent()</text:span>) to create a <text:span text:style-name="Source_20_Text">ListView</text:span> that lists each light with an ON/OFF indicator:</text:p>
      <text:p text:style-name="P14"><text:span text:style-name="Source_20_Text"><text:s text:c="8"/>private void BuildLightList()</text:span></text:p>
      <text:p text:style-name="P14"><text:span text:style-name="Source_20_Text"><text:s text:c="8"/>{</text:span></text:p>
      <text:p text:style-name="P14"><text:span text:style-name="Source_20_Text"><text:s text:c="12"/>_lightList = new ListView</text:span></text:p>
      <text:p text:style-name="P14"><text:span text:style-name="Source_20_Text"><text:s text:c="12"/>{</text:span></text:p>
      <text:p text:style-name="P14"><text:span text:style-name="Source_20_Text"><text:s text:c="16"/>View = View.Details,</text:span></text:p>
      <text:p text:style-name="P14"><text:span text:style-name="Source_20_Text"><text:s text:c="16"/>Location = new System.Drawing.Point(15, 120),</text:span></text:p>
      <text:p text:style-name="P14"><text:span text:style-name="Source_20_Text"><text:s text:c="16"/>Size = new System.Drawing.Size(300, 460),</text:span></text:p>
      <text:p text:style-name="P14"><text:span text:style-name="Source_20_Text"><text:s text:c="16"/>FullRowSelect = true,</text:span></text:p>
      <text:p text:style-name="P14"><text:span text:style-name="Source_20_Text"><text:s text:c="16"/>GridLines = true,</text:span></text:p>
      <text:p text:style-name="P14"><text:span text:style-name="Source_20_Text"><text:s text:c="16"/>HeaderStyle = ColumnHeaderStyle.Nonclickable</text:span></text:p>
      <text:p text:style-name="P14"><text:span text:style-name="Source_20_Text"><text:s text:c="12"/>};</text:span></text:p>
      <text:p text:style-name="P14"><text:span text:style-name="Source_20_Text"><text:s text:c="12"/>_lightList.Columns.Add("Annunciator", 220);</text:span></text:p>
      <text:p text:style-name="P14"><text:span text:style-name="Source_20_Text"><text:s text:c="12"/>_lightList.Columns.Add("State", 70);</text:span></text:p>
      <text:p text:style-name="P14"/>
      <text:p text:style-name="P14"><text:span text:style-name="Source_20_Text"><text:s text:c="12"/>// Pre-create one row per bit</text:span></text:p>
      <text:p text:style-name="P14"><text:span text:style-name="Source_20_Text"><text:s text:c="12"/>foreach (var (bit, name) in AnnunciatorBits)</text:span></text:p>
      <text:p text:style-name="P14"><text:span text:style-name="Source_20_Text"><text:s text:c="12"/>{</text:span></text:p>
      <text:p text:style-name="P14"><text:span text:style-name="Source_20_Text"><text:s text:c="16"/>var item = new ListViewItem(name);</text:span></text:p>
      <text:p text:style-name="P14"><text:span text:style-name="Source_20_Text"><text:s text:c="16"/>item.SubItems.Add("OFF");</text:span></text:p>
      <text:p text:style-name="P14"><text:span text:style-name="Source_20_Text"><text:s text:c="16"/>item.Tag = bit;</text:span></text:p>
      <text:p text:style-name="P14"><text:span text:style-name="Source_20_Text"><text:s text:c="16"/>_lightList.Items.Add(item);</text:span></text:p>
      <text:p text:style-name="P14"><text:span text:style-name="Source_20_Text"><text:s text:c="12"/>}</text:span></text:p>
      <text:p text:style-name="P14"/>
      <text:p text:style-name="P14"><text:span text:style-name="Source_20_Text"><text:s text:c="12"/>this.Controls.Add(_lightList);</text:span></text:p>
      <text:p text:style-name="P14"><text:span text:style-name="Source_20_Text"><text:s text:c="12"/>this.ClientSize = new System.Drawing.Size(330, 600);</text:span></text:p>
      <text:p text:style-name="P14"><text:span text:style-name="Source_20_Text"><text:s text:c="8"/>}</text:span></text:p>
      <text:p text:style-name="Text_20_body">Call it in the constructor:</text:p>
      <text:p text:style-name="P14"><text:span text:style-name="Source_20_Text"><text:s text:c="8"/>public MainForm()</text:span></text:p>
      <text:p text:style-name="P14"><text:span text:style-name="Source_20_Text"><text:s text:c="8"/>{</text:span></text:p>
      <text:p text:style-name="P14"><text:soft-page-break/><text:span text:style-name="Source_20_Text"><text:s text:c="12"/>InitializeComponent();</text:span></text:p>
      <text:p text:style-name="P14"><text:span text:style-name="Source_20_Text"><text:s text:c="12"/>BuildLightList();</text:span></text:p>
      <text:p text:style-name="P14"/>
      <text:p text:style-name="P14"><text:span text:style-name="Source_20_Text"><text:s text:c="12"/>_timer.Interval = 100; // 100 ms update rate</text:span></text:p>
      <text:p text:style-name="P14"><text:span text:style-name="Source_20_Text"><text:s text:c="12"/>_timer.Tick += Timer_Tick;</text:span></text:p>
      <text:p text:style-name="P14"><text:span text:style-name="Source_20_Text"><text:s text:c="8"/>}</text:span></text:p>
      <text:h text:style-name="P13" text:outline-level="2">Reading and Extracting the Bits</text:h>
      <text:p text:style-name="Text_20_body">Update your <text:span text:style-name="Source_20_Text">Timer_Tick</text:span> to decode the bits each cycle:</text:p>
      <text:p text:style-name="P14"><text:span text:style-name="Source_20_Text"><text:s text:c="8"/>private void Timer_Tick(object sender, EventArgs e)</text:span></text:p>
      <text:p text:style-name="P14"><text:span text:style-name="Source_20_Text"><text:s text:c="8"/>{</text:span></text:p>
      <text:p text:style-name="P14"><text:span text:style-name="Source_20_Text"><text:s text:c="12"/>try</text:span></text:p>
      <text:p text:style-name="P14"><text:span text:style-name="Source_20_Text"><text:s text:c="12"/>{</text:span></text:p>
      <text:p text:style-name="P14"><text:span text:style-name="Source_20_Text"><text:s text:c="16"/>FSUIPCConnection.Process();</text:span></text:p>
      <text:p text:style-name="P14"/>
      <text:p text:style-name="P14"><text:span text:style-name="Source_20_Text"><text:s text:c="16"/>// --- Existing readings ---</text:span></text:p>
      <text:p text:style-name="P14"><text:span text:style-name="Source_20_Text"><text:s text:c="16"/>double airspeedKnots = _airspeed.Value / 128.0;</text:span></text:p>
      <text:p text:style-name="P14"><text:span text:style-name="Source_20_Text"><text:s text:c="16"/>double torquePercent = _torque.Value;</text:span></text:p>
      <text:p text:style-name="P14"><text:span text:style-name="Source_20_Text"><text:s text:c="16"/>double com1Freq = ConvertBcdComFrequency(_com1.Value);</text:span></text:p>
      <text:p text:style-name="P14"/>
      <text:p text:style-name="P14"><text:span text:style-name="Source_20_Text"><text:s text:c="16"/>lblAirspeed.Text = $"Airspeed: <text:s/>{airspeedKnots:F1} kt";</text:span></text:p>
      <text:p text:style-name="P14"><text:span text:style-name="Source_20_Text"><text:s text:c="16"/>lblTorque.Text <text:s text:c="2"/>= $"Torque: <text:s text:c="3"/>{torquePercent:F1} %";</text:span></text:p>
      <text:p text:style-name="P14"><text:span text:style-name="Source_20_Text"><text:s text:c="16"/>lblCom1.Text <text:s text:c="4"/>= $"COM1: <text:s text:c="5"/>{com1Freq:F3} MHz";</text:span></text:p>
      <text:p text:style-name="P14"/>
      <text:p text:style-name="P14"><text:span text:style-name="Source_20_Text"><text:s text:c="16"/>// --- Annunciator bit extraction ---</text:span></text:p>
      <text:p text:style-name="P14"><text:span text:style-name="Source_20_Text"><text:s text:c="16"/>long bits = _annunciators.Value;</text:span></text:p>
      <text:p text:style-name="P14"><text:span text:style-name="Source_20_Text"><text:s text:c="16"/>UpdateLights(bits);</text:span></text:p>
      <text:p text:style-name="P14"><text:span text:style-name="Source_20_Text"><text:s text:c="12"/>}</text:span></text:p>
      <text:p text:style-name="P14"><text:span text:style-name="Source_20_Text"><text:s text:c="12"/>catch (Exception ex)</text:span></text:p>
      <text:p text:style-name="P14"><text:span text:style-name="Source_20_Text"><text:s text:c="12"/>{</text:span></text:p>
      <text:p text:style-name="P14"><text:span text:style-name="Source_20_Text"><text:s text:c="16"/>_timer.Stop();</text:span></text:p>
      <text:p text:style-name="P14"><text:span text:style-name="Source_20_Text"><text:s text:c="16"/>MessageBox.Show("Error reading from FSUIPC.\n\n" + ex.Message,</text:span></text:p>
      <text:p text:style-name="P14"><text:span text:style-name="Source_20_Text"><text:s text:c="20"/>"Read Error", MessageBoxButtons.OK, MessageBoxIcon.Error);</text:span></text:p>
      <text:p text:style-name="P14"><text:span text:style-name="Source_20_Text"><text:s text:c="12"/>}</text:span></text:p>
      <text:p text:style-name="P14"><text:span text:style-name="Source_20_Text"><text:s text:c="8"/>}</text:span></text:p>
      <text:p text:style-name="P14"/>
      <text:p text:style-name="P14"><text:span text:style-name="Source_20_Text"><text:s text:c="8"/>private void UpdateLights(long bits)</text:span></text:p>
      <text:p text:style-name="P14"><text:soft-page-break/><text:span text:style-name="Source_20_Text"><text:s text:c="8"/>{</text:span></text:p>
      <text:p text:style-name="P14"><text:span text:style-name="Source_20_Text"><text:s text:c="12"/>_lightList.BeginUpdate();</text:span></text:p>
      <text:p text:style-name="P14"><text:span text:style-name="Source_20_Text"><text:s text:c="12"/>foreach (ListViewItem item in _lightList.Items)</text:span></text:p>
      <text:p text:style-name="P14"><text:span text:style-name="Source_20_Text"><text:s text:c="12"/>{</text:span></text:p>
      <text:p text:style-name="P14"><text:span text:style-name="Source_20_Text"><text:s text:c="16"/>int bit = (int)item.Tag;</text:span></text:p>
      <text:p text:style-name="P14"><text:span text:style-name="Source_20_Text"><text:s text:c="16"/>bool isOn = IsBitSet(bits, bit);</text:span></text:p>
      <text:p text:style-name="P14"/>
      <text:p text:style-name="P14"><text:span text:style-name="Source_20_Text"><text:s text:c="16"/>item.SubItems[1].Text = isOn ? "ON" : "OFF";</text:span></text:p>
      <text:p text:style-name="P14"><text:span text:style-name="Source_20_Text"><text:s text:c="16"/>item.BackColor = isOn</text:span></text:p>
      <text:p text:style-name="P14"><text:span text:style-name="Source_20_Text"><text:s text:c="20"/>? System.Drawing.Color.FromArgb(255, 90, 90) <text:s text:c="2"/>// red-ish when active</text:span></text:p>
      <text:p text:style-name="P14"><text:span text:style-name="Source_20_Text"><text:s text:c="20"/>: System.Drawing.Color.White;</text:span></text:p>
      <text:p text:style-name="P14"><text:span text:style-name="Source_20_Text"><text:s text:c="12"/>}</text:span></text:p>
      <text:p text:style-name="P14"><text:span text:style-name="Source_20_Text"><text:s text:c="12"/>_lightList.EndUpdate();</text:span></text:p>
      <text:p text:style-name="P14"><text:span text:style-name="Source_20_Text"><text:s text:c="8"/>}</text:span></text:p>
      <text:p text:style-name="P14"/>
      <text:p text:style-name="P14"><text:span text:style-name="Source_20_Text"><text:s text:c="8"/>/// &lt;summary&gt;Returns true if the given bit index (0-based) is set.&lt;/summary&gt;</text:span></text:p>
      <text:p text:style-name="P14"><text:span text:style-name="Source_20_Text"><text:s text:c="8"/>private static bool IsBitSet(long value, int bitIndex)</text:span></text:p>
      <text:p text:style-name="P14"><text:span text:style-name="Source_20_Text"><text:s text:c="8"/>{</text:span></text:p>
      <text:p text:style-name="P14"><text:span text:style-name="Source_20_Text"><text:s text:c="12"/>return (value &amp; (1L &lt;&lt; bitIndex)) != 0;</text:span></text:p>
      <text:p text:style-name="P14"><text:span text:style-name="Source_20_Text"><text:s text:c="8"/>}</text:span></text:p>
      <text:h text:style-name="P13" text:outline-level="2">Driving Phidgets (or Other Hardware)</text:h>
      <text:p text:style-name="Text_20_body">Since you mentioned Phidgets, the same <text:span text:style-name="Source_20_Text">IsBitSet</text:span> helper is all you need to map each bit to a digital output. For example:</text:p>
      <text:p text:style-name="P14"><text:span text:style-name="Source_20_Text"><text:s text:c="8"/>// Example: map annunciator bits to Phidgets DigitalOutput channels</text:span></text:p>
      <text:p text:style-name="P14"><text:span text:style-name="Source_20_Text"><text:s text:c="8"/>private void UpdatePhidgetOutputs(long bits)</text:span></text:p>
      <text:p text:style-name="P14"><text:span text:style-name="Source_20_Text"><text:s text:c="8"/>{</text:span></text:p>
      <text:p text:style-name="P14"><text:span text:style-name="Source_20_Text"><text:s text:c="12"/>// _phidgetOutputs would be an array/dictionary of your configured</text:span></text:p>
      <text:p text:style-name="P14"><text:span text:style-name="Source_20_Text"><text:s text:c="12"/>// Phidget.DigitalOutput objects, indexed to match the bit layout.</text:span></text:p>
      <text:p text:style-name="P14"><text:span text:style-name="Source_20_Text"><text:s text:c="12"/>foreach (var (bit, name) in AnnunciatorBits)</text:span></text:p>
      <text:p text:style-name="P14"><text:span text:style-name="Source_20_Text"><text:s text:c="12"/>{</text:span></text:p>
      <text:p text:style-name="P14"><text:span text:style-name="Source_20_Text"><text:s text:c="16"/>bool isOn = IsBitSet(bits, bit);</text:span></text:p>
      <text:p text:style-name="P14"><text:span text:style-name="Source_20_Text"><text:s text:c="16"/>if (_phidgetOutputs.TryGetValue(bit, out var output))</text:span></text:p>
      <text:p text:style-name="P14"><text:span text:style-name="Source_20_Text"><text:s text:c="16"/>{</text:span></text:p>
      <text:p text:style-name="P14"><text:span text:style-name="Source_20_Text"><text:s text:c="20"/>output.State = isOn; <text:s text:c="2"/>// drives the physical lamp</text:span></text:p>
      <text:p text:style-name="P14"><text:soft-page-break/><text:span text:style-name="Source_20_Text"><text:s text:c="16"/>}</text:span></text:p>
      <text:p text:style-name="P14"><text:span text:style-name="Source_20_Text"><text:s text:c="12"/>}</text:span></text:p>
      <text:p text:style-name="P14"><text:span text:style-name="Source_20_Text"><text:s text:c="8"/>}</text:span></text:p>
      <text:p text:style-name="Text_20_body">You'd call <text:span text:style-name="Source_20_Text">UpdatePhidgetOutputs(bits)</text:span> right alongside <text:span text:style-name="Source_20_Text">UpdateLights(bits)</text:span> in the timer tick.</text:p>
      <text:h text:style-name="P13" text:outline-level="2">Key Points</text:h>
      <text:list text:style-name="L5">
        <text:list-item>
          <text:p text:style-name="P15"><text:span text:style-name="Strong_20_Emphasis">Read as </text:span><text:span text:style-name="Strong_20_Emphasis"><text:span text:style-name="Source_20_Text">long</text:span></text:span><text:span text:style-name="Strong_20_Emphasis"> (8 bytes)</text:span> to match the documented data width and cover bit 20. </text:p>
        </text:list-item>
        <text:list-item>
          <text:p text:style-name="P15"><text:span text:style-name="Strong_20_Emphasis"><text:span text:style-name="Source_20_Text">1L &lt;&lt; bitIndex</text:span></text:span> — note the <text:span text:style-name="Source_20_Text">L</text:span> suffix so the shift is done on a 64-bit value, important for bits above 31. </text:p>
        </text:list-item>
        <text:list-item>
          <text:p text:style-name="P15"><text:span text:style-name="Strong_20_Emphasis">Change detection</text:span>: if you're driving hardware, consider comparing <text:span text:style-name="Source_20_Text">bits</text:span> to the previous value and only writing to Phidgets when something changes, to avoid unnecessary I/O every 100ms. </text:p>
        </text:list-item>
        <text:list-item>
          <text:p text:style-name="P16"><text:span text:style-name="Strong_20_Emphasis">Verify the offset semantics</text:span>: <text:span text:style-name="Source_20_Text">0x2F28</text:span> is documented in the standard FSUIPC offset list as <text:span text:style-name="Emphasis">Concorde nose visor %</text:span>. Repurposing it for annunciator bits means something in your setup (a Lua script, gauge, or add-on) is writing this packed value there. Just make sure nothing else is competing for that offset. </text:p>
        </text:list-item>
      </text:list>
      <text:p text:style-name="Text_20_body">Would you like me to add change-detection so both the UI and the Phidgets outputs only update when a bit actually flips?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apple-system" svg:font-family="apple-system, system-ui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00:26:33.185949000</meta:creation-date>
    <dc:date>2026-07-06T00:45:07.862371000</dc:date>
    <meta:editing-duration>PT9M11S</meta:editing-duration>
    <meta:editing-cycles>2</meta:editing-cycles>
    <meta:generator>LibreOffice/26.2.2.2$MacOSX_AARCH64 LibreOffice_project/1f77d10d6938fd34972958f64b2bcfa54f8b1ba5</meta:generator>
    <meta:document-statistic meta:table-count="1" meta:image-count="0" meta:object-count="0" meta:page-count="9" meta:paragraph-count="283" meta:word-count="1677" meta:character-count="13808" meta:non-whitespace-character-count="10003"/>
  </office:meta>
</office:document-meta>
</file>