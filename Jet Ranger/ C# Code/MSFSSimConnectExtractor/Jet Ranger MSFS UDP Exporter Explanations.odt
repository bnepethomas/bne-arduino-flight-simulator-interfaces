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3D000006F3DBCED794.jpg" manifest:media-type="image/jpeg"/>
  <manifest:file-entry manifest:full-path="Pictures/1000000000000270000000670B8F4323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nsolas" svg:font-family="Consolas, 'Courier New', monospace"/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automatic-styles>
    <style:style style:name="Variables_5f_to_5f_add" style:display-name="Variables_to_add" style:family="table">
      <style:table-properties style:width="6.6931in" table:align="margins"/>
    </style:style>
    <style:style style:name="Variables_5f_to_5f_add.A" style:display-name="Variables_to_add.A" style:family="table-column">
      <style:table-column-properties style:column-width="2.2306in" style:rel-column-width="21840*"/>
    </style:style>
    <style:style style:name="Variables_5f_to_5f_add.B" style:display-name="Variables_to_add.B" style:family="table-column">
      <style:table-column-properties style:column-width="1.1444in" style:rel-column-width="11205*"/>
    </style:style>
    <style:style style:name="Variables_5f_to_5f_add.C" style:display-name="Variables_to_add.C" style:family="table-column">
      <style:table-column-properties style:column-width="3.3181in" style:rel-column-width="32490*"/>
    </style:style>
    <style:style style:name="Variables_5f_to_5f_add.1" style:display-name="Variables_to_add.1" style:family="table-row">
      <style:table-row-properties style:min-row-height="0.375in"/>
    </style:style>
    <style:style style:name="Variables_5f_to_5f_add.A1" style:display-name="Variables_to_add.A1" style:family="table-cell">
      <style:table-cell-properties fo:padding="0in" fo:border="none"/>
    </style:style>
    <style:style style:name="Variables_5f_to_5f_add.A2" style:display-name="Variables_to_add.A2" style:family="table-cell">
      <style:table-cell-properties style:vertical-align="middle" fo:padding="0in" fo:border="none"/>
    </style:style>
    <style:style style:name="Variables_5f_to_5f_add.7" style:display-name="Variables_to_add.7" style:family="table-row">
      <style:table-row-properties style:min-row-height="0.7208in"/>
    </style:style>
    <style:style style:name="Variables_5f_to_5f_add.12" style:display-name="Variables_to_add.12" style:family="table-row">
      <style:table-row-properties style:min-row-height="0.4111in"/>
    </style:style>
    <style:style style:name="P1" style:family="paragraph" style:parent-style-name="Text_20_body">
      <style:paragraph-properties fo:margin-left="0in" fo:margin-right="0in" fo:text-indent="0in" style:auto-text-indent="false"/>
      <style:text-properties officeooo:paragraph-rsid="000c4096"/>
    </style:style>
    <style:style style:name="P2" style:family="paragraph" style:parent-style-name="Text_20_body">
      <style:paragraph-properties fo:margin-left="0in" fo:margin-right="0in" fo:text-indent="0in" style:auto-text-indent="false"/>
      <style:text-properties officeooo:paragraph-rsid="00070d3d"/>
    </style:style>
    <style:style style:name="P3" style:family="paragraph" style:parent-style-name="Text_20_body">
      <style:paragraph-properties fo:margin-left="0in" fo:margin-right="0in" fo:text-indent="0in" style:auto-text-indent="false"/>
      <style:text-properties officeooo:paragraph-rsid="00070679"/>
    </style:style>
    <style:style style:name="P4" style:family="paragraph" style:parent-style-name="Text_20_body">
      <style:paragraph-properties fo:margin-left="0in" fo:margin-right="0in" fo:text-indent="0in" style:auto-text-indent="false"/>
      <style:text-properties officeooo:paragraph-rsid="000933a8"/>
    </style:style>
    <style:style style:name="P5" style:family="paragraph" style:parent-style-name="Text_20_body">
      <style:paragraph-properties fo:margin-left="0in" fo:margin-right="0in" fo:text-indent="0in" style:auto-text-indent="false"/>
      <style:text-properties officeooo:paragraph-rsid="0009f3a3"/>
    </style:style>
    <style:style style:name="P6" style:family="paragraph" style:parent-style-name="Text_20_body">
      <style:text-properties officeooo:rsid="000ebf1a" officeooo:paragraph-rsid="000ebf1a"/>
    </style:style>
    <style:style style:name="P7" style:family="paragraph" style:parent-style-name="Text_20_body">
      <style:text-properties officeooo:rsid="001262a8" officeooo:paragraph-rsid="001262a8"/>
    </style:style>
    <style:style style:name="P8" style:family="paragraph" style:parent-style-name="Text_20_body">
      <style:text-properties officeooo:rsid="0009f3a3" officeooo:paragraph-rsid="0009f3a3"/>
    </style:style>
    <style:style style:name="P9" style:family="paragraph" style:parent-style-name="Text_20_body">
      <style:text-properties officeooo:paragraph-rsid="0009f3a3"/>
    </style:style>
    <style:style style:name="P10" style:family="paragraph" style:parent-style-name="Text_20_body">
      <style:text-properties officeooo:rsid="000c9d3e" officeooo:paragraph-rsid="000c9d3e"/>
    </style:style>
    <style:style style:name="P11" style:family="paragraph" style:parent-style-name="Text_20_body">
      <style:text-properties officeooo:rsid="000cce6d" officeooo:paragraph-rsid="000cce6d"/>
    </style:style>
    <style:style style:name="P12" style:family="paragraph" style:parent-style-name="Text_20_body">
      <style:text-properties officeooo:rsid="00130e45" officeooo:paragraph-rsid="00130e45"/>
    </style:style>
    <style:style style:name="P13" style:family="paragraph" style:parent-style-name="Text_20_body">
      <style:text-properties officeooo:rsid="0010b305" officeooo:paragraph-rsid="0010b305"/>
    </style:style>
    <style:style style:name="P14" style:family="paragraph" style:parent-style-name="Standard">
      <style:paragraph-properties style:line-height-at-least="0.198in"/>
      <style:text-properties fo:color="#4e5b61" loext:opacity="100%" style:font-name="Consolas" fo:font-size="10.5pt" fo:font-weight="normal" fo:background-color="#ffffff"/>
    </style:style>
    <style:style style:name="P15" style:family="paragraph" style:parent-style-name="Text_20_body">
      <style:paragraph-properties fo:margin-left="0in" fo:margin-right="0in" fo:text-indent="0in" style:auto-text-indent="false"/>
      <style:text-properties officeooo:paragraph-rsid="00078c69"/>
    </style:style>
    <style:style style:name="P16" style:family="paragraph" style:parent-style-name="Text_20_body" style:list-style-name="L1">
      <style:text-properties officeooo:paragraph-rsid="00078c69"/>
    </style:style>
    <style:style style:name="P17" style:family="paragraph" style:parent-style-name="Text_20_body" style:list-style-name="L2">
      <style:text-properties officeooo:paragraph-rsid="00078c69"/>
    </style:style>
    <style:style style:name="P18" style:family="paragraph" style:parent-style-name="Text_20_body" style:list-style-name="L3">
      <style:text-properties officeooo:paragraph-rsid="00078c69"/>
    </style:style>
    <style:style style:name="P19" style:family="paragraph" style:parent-style-name="Text_20_body">
      <style:paragraph-properties fo:margin-left="0in" fo:margin-right="0in" fo:text-indent="0in" style:auto-text-indent="false"/>
      <style:text-properties officeooo:paragraph-rsid="000774cc"/>
    </style:style>
    <style:style style:name="P20" style:family="paragraph" style:parent-style-name="Standard">
      <style:paragraph-properties fo:margin-left="0in" fo:margin-right="0in" fo:text-indent="0in" style:auto-text-indent="false"/>
      <style:text-properties officeooo:paragraph-rsid="00070679"/>
    </style:style>
    <style:style style:name="P21" style:family="paragraph" style:parent-style-name="Text_20_body" style:list-style-name="L4">
      <style:paragraph-properties fo:margin-left="0in" fo:margin-right="0in" fo:margin-top="0in" fo:margin-bottom="0.1252in" style:contextual-spacing="false" style:line-height-at-least="0.25in" fo:orphans="2" fo:widows="2" fo:text-indent="0in" style:auto-text-indent="false" fo:padding="0in" fo:border="none"/>
    </style:style>
    <style:style style:name="P22" style:family="paragraph" style:parent-style-name="Text_20_body">
      <style:paragraph-properties fo:margin-left="0in" fo:margin-right="0in" fo:margin-top="0in" fo:margin-bottom="0.25in" style:contextual-spacing="false" style:line-height-at-least="0.2917in" fo:orphans="2" fo:widows="2" fo:text-indent="0in" style:auto-text-indent="false"/>
      <style:text-properties fo:font-variant="normal" fo:text-transform="none" fo:color="#001d35" loext:opacity="100%" style:font-name="Google Sans" fo:font-size="15pt" fo:letter-spacing="normal" fo:font-style="normal" fo:font-weight="normal"/>
    </style:style>
    <style:style style:name="P23" style:family="paragraph" style:parent-style-name="Text_20_body">
      <style:paragraph-properties fo:margin-left="0in" fo:margin-right="0in" fo:text-indent="0in" style:auto-text-indent="false"/>
    </style:style>
    <style:style style:name="P24" style:family="paragraph" style:parent-style-name="Text_20_body" style:list-style-name="L5">
      <style:paragraph-properties fo:margin-left="0in" fo:margin-right="0in" fo:margin-top="0in" fo:margin-bottom="0in" style:contextual-spacing="false" fo:text-indent="0in" style:auto-text-indent="false"/>
    </style:style>
    <style:style style:name="P25" style:family="paragraph" style:parent-style-name="Text_20_body" style:list-style-name="L5">
      <style:paragraph-properties fo:margin-left="0in" fo:margin-right="0in" fo:text-indent="0in" style:auto-text-indent="false"/>
    </style:style>
    <style:style style:name="P26" style:family="paragraph" style:parent-style-name="Text_20_body" style:list-style-name="L6">
      <style:paragraph-properties fo:margin-left="0in" fo:margin-right="0in" fo:margin-top="0in" fo:margin-bottom="0in" style:contextual-spacing="false" fo:text-indent="0in" style:auto-text-indent="false"/>
    </style:style>
    <style:style style:name="P27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P28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officeooo:paragraph-rsid="000554cf"/>
    </style:style>
    <style:style style:name="P29" style:family="paragraph" style:parent-style-name="Text_20_body">
      <style:paragraph-properties fo:margin-left="0.9846in" fo:margin-right="0in" fo:margin-top="0in" fo:margin-bottom="0in" style:contextual-spacing="false" fo:text-indent="0in" style:auto-text-indent="false"/>
      <style:text-properties officeooo:paragraph-rsid="000554cf"/>
    </style:style>
    <style:style style:name="P30" style:family="paragraph" style:parent-style-name="Text_20_body" style:list-style-name="L6">
      <style:paragraph-properties fo:margin-left="0in" fo:margin-right="0in" fo:text-indent="0in" style:auto-text-indent="false"/>
    </style:style>
    <style:style style:name="P31" style:family="paragraph" style:parent-style-name="Text_20_body">
      <style:paragraph-properties fo:margin-left="0in" fo:margin-right="0in" fo:text-indent="0in" style:auto-text-indent="false" fo:break-before="page"/>
      <style:text-properties officeooo:rsid="00142c87" officeooo:paragraph-rsid="00142c87"/>
    </style:style>
    <style:style style:name="P32" style:family="paragraph" style:parent-style-name="Text_20_body">
      <style:paragraph-properties fo:margin-left="0in" fo:margin-right="0in" fo:text-indent="0in" style:auto-text-indent="false"/>
      <style:text-properties officeooo:rsid="00142c87" officeooo:paragraph-rsid="00142c87"/>
    </style:style>
    <style:style style:name="P33" style:family="paragraph" style:parent-style-name="Standard">
      <style:text-properties officeooo:rsid="00142c87" officeooo:paragraph-rsid="00142c87"/>
    </style:style>
    <style:style style:name="T1" style:family="text">
      <style:text-properties officeooo:rsid="000c4096"/>
    </style:style>
    <style:style style:name="T2" style:family="text">
      <style:text-properties officeooo:rsid="00070d3d"/>
    </style:style>
    <style:style style:name="T3" style:family="text">
      <style:text-properties officeooo:rsid="000933a8"/>
    </style:style>
    <style:style style:name="T4" style:family="text">
      <style:text-properties officeooo:rsid="0009f3a3"/>
    </style:style>
    <style:style style:name="T5" style:family="text">
      <style:text-properties officeooo:rsid="000ebf1a"/>
    </style:style>
    <style:style style:name="T6" style:family="text">
      <style:text-properties officeooo:rsid="001262a8"/>
    </style:style>
    <style:style style:name="T7" style:family="text">
      <style:text-properties officeooo:rsid="00078c69"/>
    </style:style>
    <style:style style:name="T8" style:family="text">
      <style:text-properties officeooo:rsid="000774cc"/>
    </style:style>
    <style:style style:name="T9" style:family="text">
      <style:text-properties officeooo:rsid="00070679"/>
    </style:style>
    <style:style style:name="T10" style:family="text">
      <style:text-properties fo:font-variant="normal" fo:text-transform="none" fo:color="#001d35" loext:opacity="100%" style:font-name="Google Sans" fo:font-size="15pt" fo:letter-spacing="normal" fo:font-style="normal" fo:font-weight="normal"/>
    </style:style>
    <style:style style:name="T11" style:family="text">
      <style:text-properties fo:font-variant="normal" fo:text-transform="none" fo:color="#0a0a0a" loext:opacity="100%" style:font-name="Google Sans" fo:font-size="12pt" fo:letter-spacing="normal" fo:font-style="normal" fo:font-weight="bold"/>
    </style:style>
    <style:style style:name="T12" style:family="text">
      <style:text-properties fo:font-variant="normal" fo:text-transform="none" fo:color="#0a0a0a" loext:opacity="100%" style:font-name="Google Sans" fo:font-size="12pt" fo:letter-spacing="normal" fo:font-style="normal" fo:font-weight="normal"/>
    </style:style>
    <style:style style:name="T13" style:family="text">
      <style:text-properties officeooo:rsid="0000922d"/>
    </style:style>
    <style:style style:name="T14" style:family="text">
      <style:text-properties officeooo:rsid="000283e2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0554cf" style:font-weight-asian="normal" style:font-weight-complex="normal"/>
    </style:style>
    <style:style style:name="T17" style:family="text">
      <style:text-properties fo:font-family="'Courier New'" style:font-family-generic="modern" style:font-pitch="fixed" fo:font-size="8pt" style:font-size-asian="8pt" style:font-size-complex="8pt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Looks like different builds will need to be compiled to run P3d and MSFS, P3d for Dodo and MSFS for Flyinside and Cowan</text:span></text:span></text:p>
      <text:p text:style-name="P1"><text:span text:style-name="Strong_20_Emphasis"/></text:p>
      <text:p text:style-name="P2"><text:span text:style-name="Strong_20_Emphasis"/></text:p>
      <text:p text:style-name="P2"><text:span text:style-name="Strong_20_Emphasis"><text:span text:style-name="T2">Data returned as off 202601260757</text:span></text:span></text:p>
      <text:p text:style-name="P2"><text:span text:style-name="Strong_20_Emphasis"/></text:p>
      <text:p text:style-name="P2"><text:span text:style-name="Strong_20_Emphasis"/></text:p>
      <text:p text:style-name="P2"><draw:frame draw:style-name="fr1" draw:name="Image2" text:anchor-type="paragraph" svg:width="4.4791in" svg:height="5.9374in" draw:z-index="1"><draw:image xlink:href="Pictures/100000000000053D000006F3DBCED794.jpg" xlink:type="simple" xlink:show="embed" xlink:actuate="onLoad" draw:mime-type="image/jpeg"/></draw:frame><text:span text:style-name="Strong_20_Emphasis"/></text:p>
      <text:p text:style-name="P3"><text:span text:style-name="Strong_20_Emphasis"/></text:p>
      <text:p text:style-name="P2"><text:span text:style-name="Strong_20_Emphasis"><text:span text:style-name="T2">Values wanted</text:span></text:span></text:p>
      <text:p text:style-name="P2"><text:span text:style-name="Strong_20_Emphasis"/></text:p>
      <text:p text:style-name="P4"><text:span text:style-name="Strong_20_Emphasis"><text:span text:style-name="T3">Test with Generic MSFS Helicopter and then Dodo</text:span></text:span></text:p>
      <text:p text:style-name="P4"><text:span text:style-name="Strong_20_Emphasis"/></text:p>
      <text:p text:style-name="P5"><text:soft-page-break/><text:span text:style-name="Strong_20_Emphasis"><text:span text:style-name="T4">When adding </text:span></text:span></text:p>
      <table:table table:name="Variables_to_add" table:style-name="Variables_5f_to_5f_add">
        <table:table-column table:style-name="Variables_5f_to_5f_add.A"/>
        <table:table-column table:style-name="Variables_5f_to_5f_add.B"/>
        <table:table-column table:style-name="Variables_5f_to_5f_add.C"/>
        <table:table-row table:style-name="Variables_5f_to_5f_add.1">
          <table:table-cell table:style-name="Variables_5f_to_5f_add.A1" office:value-type="string">
            <text:p text:style-name="Text_20_body"><text:span text:style-name="Strong_20_Emphasis">Battery On</text:span></text:p>
          </table:table-cell>
          <table:table-cell table:style-name="Variables_5f_to_5f_add.A1" office:value-type="string">
            <text:p text:style-name="P6">Cowan</text:p>
          </table:table-cell>
          <table:table-cell table:style-name="Variables_5f_to_5f_add.A1" office:value-type="string">
            <text:p text:style-name="Text_20_body">Attribute</text:p>
          </table:table-cell>
        </table:table-row>
        <table:table-row>
          <table:table-cell table:style-name="Variables_5f_to_5f_add.A2" office:value-type="string">
            <text:p text:style-name="Text_20_body"><text:span text:style-name="Strong_20_Emphasis">Avionics Power</text:span></text:p>
          </table:table-cell>
          <table:table-cell table:style-name="Variables_5f_to_5f_add.A1" office:value-type="string">
            <text:p text:style-name="P7">Yes</text:p>
          </table:table-cell>
          <table:table-cell table:style-name="Variables_5f_to_5f_add.A1" office:value-type="string">
            <text:p text:style-name="P7">Could also monitor bus voltage if so desired</text:p>
          </table:table-cell>
        </table:table-row>
        <table:table-row>
          <table:table-cell table:style-name="Variables_5f_to_5f_add.A1" office:value-type="string">
            <text:p text:style-name="Text_20_body"><text:span text:style-name="Strong_20_Emphasis">Altitude</text:span></text:p>
          </table:table-cell>
          <table:table-cell table:style-name="Variables_5f_to_5f_add.A1" office:value-type="string">
            <text:p text:style-name="Text_20_body">Yes</text:p>
          </table:table-cell>
          <table:table-cell table:style-name="Variables_5f_to_5f_add.A1" office:value-type="string">
            <text:p text:style-name="Text_20_body">altitude</text:p>
          </table:table-cell>
        </table:table-row>
        <table:table-row>
          <table:table-cell table:style-name="Variables_5f_to_5f_add.A1" office:value-type="string">
            <text:p text:style-name="Text_20_body"><text:span text:style-name="Strong_20_Emphasis">Radar Altitude</text:span></text:p>
          </table:table-cell>
          <table:table-cell table:style-name="Variables_5f_to_5f_add.A1" office:value-type="string">
            <text:p text:style-name="Text_20_body">Yes</text:p>
          </table:table-cell>
          <table:table-cell table:style-name="Variables_5f_to_5f_add.A1" office:value-type="string">
            <text:p text:style-name="Text_20_body">PLANE_ALT_ABOVE_GROUND</text:p>
          </table:table-cell>
        </table:table-row>
        <table:table-row>
          <table:table-cell table:style-name="Variables_5f_to_5f_add.A1" office:value-type="string">
            <text:p text:style-name="Text_20_body">VSI</text:p>
          </table:table-cell>
          <table:table-cell table:style-name="Variables_5f_to_5f_add.A1" office:value-type="string">
            <text:p text:style-name="P8">Yes</text:p>
          </table:table-cell>
          <table:table-cell table:style-name="Variables_5f_to_5f_add.A1" office:value-type="string">
            <text:p text:style-name="Text_20_body">VERTICAL_SPEED</text:p>
          </table:table-cell>
        </table:table-row>
        <table:table-row>
          <table:table-cell table:style-name="Variables_5f_to_5f_add.A1" office:value-type="string">
            <text:p text:style-name="P9">Airspeed</text:p>
          </table:table-cell>
          <table:table-cell table:style-name="Variables_5f_to_5f_add.A1" office:value-type="string">
            <text:p text:style-name="P10">Yes</text:p>
          </table:table-cell>
          <table:table-cell table:style-name="Variables_5f_to_5f_add.A1" office:value-type="string">
            <text:p text:style-name="Text_20_body">airspeed</text:p>
          </table:table-cell>
        </table:table-row>
        <table:table-row table:style-name="Variables_5f_to_5f_add.7">
          <table:table-cell table:style-name="Variables_5f_to_5f_add.A1" office:value-type="string">
            <text:p text:style-name="P11">Attitude Bank</text:p>
          </table:table-cell>
          <table:table-cell table:style-name="Variables_5f_to_5f_add.A1" office:value-type="string">
            <text:p text:style-name="P6">Yes</text:p>
          </table:table-cell>
          <table:table-cell table:style-name="Variables_5f_to_5f_add.A1" office:value-type="string">
            <text:p text:style-name="Text_20_body">ATTITUDE_INDICATOR_BANK_DEGREES</text:p>
            <text:p text:style-name="Text_20_body"><text:s/></text:p>
          </table:table-cell>
        </table:table-row>
        <table:table-row>
          <table:table-cell table:style-name="Variables_5f_to_5f_add.A1" office:value-type="string">
            <text:p text:style-name="P11">Attitude Pitch</text:p>
          </table:table-cell>
          <table:table-cell table:style-name="Variables_5f_to_5f_add.A1" office:value-type="string">
            <text:p text:style-name="P6">Yes</text:p>
          </table:table-cell>
          <table:table-cell table:style-name="Variables_5f_to_5f_add.A1" office:value-type="string">
            <text:p text:style-name="Text_20_body"><text:s/>ATTITUDE_INDICATOR_PITCH_DEGREES</text:p>
          </table:table-cell>
        </table:table-row>
        <table:table-row>
          <table:table-cell table:style-name="Variables_5f_to_5f_add.A1" office:value-type="string">
            <text:p text:style-name="Text_20_body">EngineTorque</text:p>
          </table:table-cell>
          <table:table-cell table:style-name="Variables_5f_to_5f_add.A1" office:value-type="string">
            <text:p text:style-name="P6">Yes</text:p>
          </table:table-cell>
          <table:table-cell table:style-name="Variables_5f_to_5f_add.A1" office:value-type="string">
            <text:p text:style-name="Text_20_body"><text:span text:style-name="T5">E</text:span>NG_TORQUE_PERCENT_1</text:p>
          </table:table-cell>
        </table:table-row>
        <table:table-row>
          <table:table-cell table:style-name="Variables_5f_to_5f_add.A1" office:value-type="string">
            <text:p text:style-name="Text_20_body">TransmissionPressure</text:p>
          </table:table-cell>
          <table:table-cell table:style-name="Variables_5f_to_5f_add.A1" office:value-type="string">
            <text:p text:style-name="P12">No</text:p>
          </table:table-cell>
          <table:table-cell table:style-name="Variables_5f_to_5f_add.A1" office:value-type="string">
            <text:p text:style-name="P12">Deprecated - ENG TRANSMISSION PRESSURE</text:p>
          </table:table-cell>
        </table:table-row>
        <table:table-row>
          <table:table-cell table:style-name="Variables_5f_to_5f_add.A1" office:value-type="string">
            <text:p text:style-name="Text_20_body">TransmissionTemperature</text:p>
          </table:table-cell>
          <table:table-cell table:style-name="Variables_5f_to_5f_add.A1" office:value-type="string">
            <text:p text:style-name="P12">No </text:p>
          </table:table-cell>
          <table:table-cell table:style-name="Variables_5f_to_5f_add.A1" office:value-type="string">
            <text:p text:style-name="P12">Deprecated - ENG TRANSMISSION TEMPERATURE</text:p>
          </table:table-cell>
        </table:table-row>
        <table:table-row table:style-name="Variables_5f_to_5f_add.12">
          <table:table-cell table:style-name="Variables_5f_to_5f_add.A1" office:value-type="string">
            <text:p text:style-name="Text_20_body">EnginePressure</text:p>
          </table:table-cell>
          <table:table-cell table:style-name="Variables_5f_to_5f_add.A1" office:value-type="string">
            <text:p text:style-name="P7">Yes</text:p>
          </table:table-cell>
          <table:table-cell table:style-name="Variables_5f_to_5f_add.A1" office:value-type="string">
            <text:p text:style-name="Text_20_body">ENG OIL PRESSURE:1</text:p>
          </table:table-cell>
        </table:table-row>
        <table:table-row>
          <table:table-cell table:style-name="Variables_5f_to_5f_add.A1" office:value-type="string">
            <text:p text:style-name="Text_20_body">EngineTemperature</text:p>
          </table:table-cell>
          <table:table-cell table:style-name="Variables_5f_to_5f_add.A1" office:value-type="string">
            <text:p text:style-name="P7">Yes</text:p>
          </table:table-cell>
          <table:table-cell table:style-name="Variables_5f_to_5f_add.A1" office:value-type="string">
            <text:p text:style-name="Text_20_body"><text:span text:style-name="T6">E</text:span>NG OIL TEMPERATURE:1</text:p>
          </table:table-cell>
        </table:table-row>
        <table:table-row>
          <table:table-cell table:style-name="Variables_5f_to_5f_add.A1" office:value-type="string">
            <text:p text:style-name="Text_20_body">GasProducer</text:p>
          </table:table-cell>
          <table:table-cell table:style-name="Variables_5f_to_5f_add.A1" office:value-type="string">
            <text:p text:style-name="P13">Yes</text:p>
          </table:table-cell>
          <table:table-cell table:style-name="Variables_5f_to_5f_add.A1" office:value-type="string">
            <text:p text:style-name="Text_20_body">TURB_ENG_CORRECTED_N1_1</text:p>
          </table:table-cell>
        </table:table-row>
        <table:table-row>
          <table:table-cell table:style-name="Variables_5f_to_5f_add.A1" office:value-type="string">
            <text:p text:style-name="Text_20_body">EGT</text:p>
          </table:table-cell>
          <table:table-cell table:style-name="Variables_5f_to_5f_add.A1" office:value-type="string">
            <text:p text:style-name="Text_20_body"/>
          </table:table-cell>
          <table:table-cell table:style-name="Variables_5f_to_5f_add.A1" office:value-type="string">
            <text:p text:style-name="Text_20_body"/>
          </table:table-cell>
        </table:table-row>
        <table:table-row>
          <table:table-cell table:style-name="Variables_5f_to_5f_add.A1" office:value-type="string">
            <text:p text:style-name="Text_20_body">FuelPressure</text:p>
          </table:table-cell>
          <table:table-cell table:style-name="Variables_5f_to_5f_add.A1" office:value-type="string">
            <text:p text:style-name="Text_20_body"/>
          </table:table-cell>
          <table:table-cell table:style-name="Variables_5f_to_5f_add.A1" office:value-type="string">
            <text:p text:style-name="Text_20_body"/>
          </table:table-cell>
        </table:table-row>
        <table:table-row>
          <table:table-cell table:style-name="Variables_5f_to_5f_add.A1" office:value-type="string">
            <text:p text:style-name="Text_20_body">ElectricalLoad</text:p>
          </table:table-cell>
          <table:table-cell table:style-name="Variables_5f_to_5f_add.A1" office:value-type="string">
            <text:p text:style-name="P7">Yes</text:p>
          </table:table-cell>
          <table:table-cell table:style-name="Variables_5f_to_5f_add.A1" office:value-type="string">
            <text:p text:style-name="Text_20_body">ELECTRICAL TOTAL LOAD AMPS</text:p>
          </table:table-cell>
        </table:table-row>
        <table:table-row>
          <table:table-cell table:style-name="Variables_5f_to_5f_add.A1" office:value-type="string">
            <text:p text:style-name="Text_20_body">FuelLevel</text:p>
          </table:table-cell>
          <table:table-cell table:style-name="Variables_5f_to_5f_add.A1" office:value-type="string">
            <text:p text:style-name="P7">Yes</text:p>
          </table:table-cell>
          <table:table-cell table:style-name="Variables_5f_to_5f_add.A1" office:value-type="string">
            <text:p text:style-name="Text_20_body">FUEL TOTAL QUANTITY</text:p>
          </table:table-cell>
        </table:table-row>
        <table:table-row>
          <table:table-cell table:style-name="Variables_5f_to_5f_add.A1" office:value-type="string">
            <text:p text:style-name="Text_20_body"/>
          </table:table-cell>
          <table:table-cell table:style-name="Variables_5f_to_5f_add.A1" office:value-type="string">
            <text:p text:style-name="Text_20_body"/>
          </table:table-cell>
          <table:table-cell table:style-name="Variables_5f_to_5f_add.A1" office:value-type="string">
            <text:p text:style-name="Text_20_body"/>
          </table:table-cell>
        </table:table-row>
        <table:table-row>
          <table:table-cell table:style-name="Variables_5f_to_5f_add.A1" office:value-type="string">
            <text:p text:style-name="Text_20_body">TurbineSpeed</text:p>
          </table:table-cell>
          <table:table-cell table:style-name="Variables_5f_to_5f_add.A1" office:value-type="string">
            <text:p text:style-name="P6">Yes</text:p>
          </table:table-cell>
          <table:table-cell table:style-name="Variables_5f_to_5f_add.A1" office:value-type="string">
            <text:p text:style-name="Text_20_body">GENERAL_ENG_PCT_MAX_RPM_1</text:p>
          </table:table-cell>
        </table:table-row>
        <table:table-row>
          <table:table-cell table:style-name="Variables_5f_to_5f_add.A1" office:value-type="string">
            <text:p text:style-name="Text_20_body">RotorSpeed</text:p>
          </table:table-cell>
          <table:table-cell table:style-name="Variables_5f_to_5f_add.A1" office:value-type="string">
            <text:p text:style-name="P6">Yes</text:p>
          </table:table-cell>
          <table:table-cell table:style-name="Variables_5f_to_5f_add.A1" office:value-type="string">
            <text:p text:style-name="Text_20_body"><text:span text:style-name="T5">RO</text:span>TOR_RPM_PCT_1</text:p>
          </table:table-cell>
        </table:table-row>
        <table:table-row>
          <table:table-cell table:style-name="Variables_5f_to_5f_add.A1" office:value-type="string">
            <text:p text:style-name="Text_20_body"/>
          </table:table-cell>
          <table:table-cell table:style-name="Variables_5f_to_5f_add.A1" office:value-type="string">
            <text:p text:style-name="Text_20_body"/>
          </table:table-cell>
          <table:table-cell table:style-name="Variables_5f_to_5f_add.A1" office:value-type="string">
            <text:p text:style-name="Text_20_body"/>
          </table:table-cell>
        </table:table-row>
      </table:table>
      <text:p text:style-name="P14"/>
      <text:p text:style-name="P2"><text:span text:style-name="Strong_20_Emphasis"/></text:p>
      <text:p text:style-name="P2"><text:span text:style-name="Strong_20_Emphasis"/></text:p>
      <text:p text:style-name="P15"><text:span text:style-name="Strong_20_Emphasis"><text:span text:style-name="T7">Working Values</text:span></text:span></text:p>
      <text:list text:style-name="L1">
        <text:list-item>
          <text:p text:style-name="P16"><text:span text:style-name="Strong_20_Emphasis"><text:span text:style-name="T7">Gear Centre</text:span></text:span></text:p>
        </text:list-item>
        <text:list-item>
          <text:p text:style-name="P16"><text:span text:style-name="Strong_20_Emphasis"><text:span text:style-name="T7">Gear Left</text:span></text:span></text:p>
        </text:list-item>
        <text:list-item>
          <text:p text:style-name="P16"><text:soft-page-break/><text:span text:style-name="Strong_20_Emphasis"><text:span text:style-name="T7">Plane Heading True</text:span></text:span></text:p>
        </text:list-item>
        <text:list-item>
          <text:p text:style-name="P16"><text:span text:style-name="Strong_20_Emphasis"><text:span text:style-name="T7">Absolute Time</text:span></text:span></text:p>
        </text:list-item>
      </text:list>
      <text:p text:style-name="P15"><text:span text:style-name="Strong_20_Emphasis"><text:span text:style-name="T7">Know Bad Values</text:span></text:span></text:p>
      <text:p text:style-name="P15"><text:span text:style-name="Strong_20_Emphasis"><text:span text:style-name="T7">Plane Heading Mag</text:span></text:span></text:p>
      <text:list text:style-name="L2">
        <text:list-item>
          <text:p text:style-name="P17"><text:span text:style-name="Strong_20_Emphasis"><text:span text:style-name="T7">Gear Right</text:span></text:span></text:p>
        </text:list-item>
      </text:list>
      <text:list text:style-name="L3">
        <text:list-item>
          <text:p text:style-name="P18"><text:span text:style-name="Strong_20_Emphasis"><text:span text:style-name="T7">Possible Bad</text:span></text:span></text:p>
        </text:list-item>
        <text:list-item>
          <text:p text:style-name="P18"><text:span text:style-name="Strong_20_Emphasis"><text:span text:style-name="T7">Outer Marker – behaves more like inner marker</text:span></text:span></text:p>
        </text:list-item>
      </text:list>
      <text:p text:style-name="P15"><text:span text:style-name="Strong_20_Emphasis"/></text:p>
      <text:p text:style-name="P19"><text:span text:style-name="Strong_20_Emphasis"><text:span text:style-name="T8">Keystrokes</text:span></text:span></text:p>
      <text:p text:style-name="P19"><text:span text:style-name="Strong_20_Emphasis"><text:span text:style-name="T8">Ctl Space – toggle parking brakes</text:span></text:span></text:p>
      <text:p text:style-name="P19"><text:span text:style-name="Strong_20_Emphasis">/ </text:span><text:span text:style-name="Strong_20_Emphasis"><text:span text:style-name="T8">Toggle Landing gear</text:span></text:span></text:p>
      <text:p text:style-name="P2"><text:span text:style-name="Strong_20_Emphasis"><text:span text:style-name="T2">Snipping tool <text:s/>Windoes Key – Shift - S</text:span></text:span></text:p>
      <text:p text:style-name="P3"><text:span text:style-name="Strong_20_Emphasis"><text:span text:style-name="T9">For PCs running MSFS and using c# projects need to add the following to build instructions</text:span></text:span></text:p>
      <text:p text:style-name="P3"><text:span text:style-name="Strong_20_Emphasis"><text:span text:style-name="T9">Install Visual Studio</text:span></text:span></text:p>
      <text:p text:style-name="P3"><text:span text:style-name="Strong_20_Emphasis"><text:span text:style-name="T9">Install MSFS2024 SDK ideally to </text:span></text:span><text:a xlink:type="simple" xlink:href="file:///c:/msfs" text:style-name="Internet_20_link" text:visited-style-name="Visited_20_Internet_20_Link"><text:span text:style-name="Strong_20_Emphasis"><text:span text:style-name="T9">c:\msfs</text:span></text:span></text:a><text:span text:style-name="Strong_20_Emphasis"><text:span text:style-name="T9"> 2024 sdk as the absoulte path is referenced in the c# project</text:span></text:span></text:p>
      <text:p text:style-name="P3"><text:span text:style-name="Strong_20_Emphasis"/></text:p>
      <text:p text:style-name="P3"><text:span text:style-name="Strong_20_Emphasis"><text:span text:style-name="T9">Both simconnect.dll and Micorsoft.MSFS.Simconnect.dll must be added to the project.</text:span></text:span></text:p>
      <text:p text:style-name="P20"><text:span text:style-name="Strong_20_Emphasis"><text:span text:style-name="T10">Using Visual Studio</text:span></text:span></text:p>
      <text:list text:style-name="L4">
        <text:list-item>
          <text:p text:style-name="P21"><text:span text:style-name="Strong_20_Emphasis"><text:span text:style-name="T11">Add the file to the project</text:span></text:span><text:span text:style-name="T12">:</text:span></text:p>
          <text:list>
            <text:list-item>
              <text:p text:style-name="P21"><text:span text:style-name="T12">In </text:span><text:span text:style-name="Strong_20_Emphasis"><text:span text:style-name="T11">Solution Explorer</text:span></text:span><text:span text:style-name="T12">, right-click the project name or the folder where you want to add the file.</text:span></text:p>
            </text:list-item>
            <text:list-item>
              <text:p text:style-name="P21"><text:span text:style-name="T12">Select </text:span><text:span text:style-name="Strong_20_Emphasis"><text:span text:style-name="T11">Add</text:span></text:span><text:span text:style-name="T12"> &gt; </text:span><text:span text:style-name="Strong_20_Emphasis"><text:span text:style-name="T11">Existing Item...</text:span></text:span><text:span text:style-name="T12">.</text:span></text:p>
            </text:list-item>
            <text:list-item>
              <text:p text:style-name="P21"><text:span text:style-name="T12">Browse to the file's location, select the file, and click </text:span><text:span text:style-name="Strong_20_Emphasis"><text:span text:style-name="T11">Add</text:span></text:span><text:span text:style-name="T12">.</text:span></text:p>
            </text:list-item>
          </text:list>
        </text:list-item>
        <text:list-item>
          <text:p text:style-name="P21"><text:span text:style-name="Strong_20_Emphasis"><text:span text:style-name="T11">Set file properties</text:span></text:span><text:span text:style-name="T12">:</text:span></text:p>
          <text:list>
            <text:list-item>
              <text:p text:style-name="P21"><text:span text:style-name="T12">Select the file in </text:span><text:span text:style-name="Strong_20_Emphasis"><text:span text:style-name="T11">Solution Explorer</text:span></text:span><text:span text:style-name="T12">.</text:span></text:p>
            </text:list-item>
            <text:list-item>
              <text:p text:style-name="P21"><text:span text:style-name="T12">Open the </text:span><text:span text:style-name="Strong_20_Emphasis"><text:span text:style-name="T11">Properties</text:span></text:span><text:span text:style-name="T12"> window (press </text:span><text:span text:style-name="Strong_20_Emphasis"><text:span text:style-name="T11">Alt+Enter</text:span></text:span><text:span text:style-name="T12"> or right-click the file and select </text:span><text:span text:style-name="Strong_20_Emphasis"><text:span text:style-name="T11">Properties</text:span></text:span><text:span text:style-name="T12">).</text:span></text:p>
            </text:list-item>
            <text:list-item>
              <text:p text:style-name="P21"><text:span text:style-name="T12">In the Properties window, change the </text:span><text:span text:style-name="Strong_20_Emphasis"><text:span text:style-name="T11">Build Action</text:span></text:span><text:span text:style-name="T12"> to </text:span><text:span text:style-name="Strong_20_Emphasis"><text:span text:style-name="T11">Content</text:span></text:span><text:span text:style-name="T12"> (or another appropriate action, like </text:span><text:span text:style-name="Strong_20_Emphasis"><text:span text:style-name="T11">None</text:span></text:span><text:span text:style-name="T12">, depending on your use case).</text:span></text:p>
            </text:list-item>
            <text:list-item>
              <text:p text:style-name="P21"><text:span text:style-name="T12">Change the </text:span><text:span text:style-name="Strong_20_Emphasis"><text:span text:style-name="T11">Copy to Output Directory</text:span></text:span><text:span text:style-name="T12"> setting to either </text:span><text:span text:style-name="Strong_20_Emphasis"><text:span text:style-name="T11">Copy Always</text:span></text:span><text:span text:style-name="T12"> or </text:span><text:span text:style-name="Strong_20_Emphasis"><text:span text:style-name="T11">Copy if Newer</text:span></text:span><text:span text:style-name="T12"> (the latter is generally preferred to avoid unnecessary rebuilds). </text:span></text:p>
            </text:list-item>
          </text:list>
        </text:list-item>
      </text:list>
      <text:p text:style-name="P22"><text:soft-page-break/></text:p>
      <text:p text:style-name="P3"><text:span text:style-name="Strong_20_Emphasis"/></text:p>
      <text:p text:style-name="P23"><text:span text:style-name="Strong_20_Emphasis"/></text:p>
      <text:p text:style-name="P23"><text:span text:style-name="Strong_20_Emphasis">Key Differences in C# SimConnect:</text:span></text:p>
      <text:list text:style-name="L5">
        <text:list-item>
          <text:p text:style-name="P24"><text:span text:style-name="Strong_20_Emphasis">Direct SDK Usage</text:span>: Instead of a Python wrapper, we'll use the <text:span text:style-name="Source_20_Text">Microsoft.FlightSimulator.SimConnect.dll</text:span> directly.</text:p>
        </text:list-item>
        <text:list-item>
          <text:p text:style-name="P24"><text:span text:style-name="Strong_20_Emphasis">Event-Driven</text:span>: SimConnect in C# is heavily event-driven. You register handlers for events like connection, disconnection, and data reception.</text:p>
        </text:list-item>
        <text:list-item>
          <text:p text:style-name="P24"><text:span text:style-name="Strong_20_Emphasis">Data Definitions (Structs)</text:span>: You explicitly define C# <text:span text:style-name="Source_20_Text">struct</text:span>s to tell SimConnect how to package the requested data. For many individual variables, we'll request them one by one and collect them into a dictionary.</text:p>
        </text:list-item>
        <text:list-item>
          <text:p text:style-name="P24"><text:span text:style-name="Strong_20_Emphasis">Message Loop</text:span>: A <text:span text:style-name="Source_20_Text">SimConnect</text:span> object typically runs in its own message loop or requires <text:span text:style-name="Source_20_Text">SimConnect.ReceiveMessage()</text:span> to be called periodically. For a console app, we'll use a <text:span text:style-name="Source_20_Text">Timer</text:span> to manage reconnection and a separate <text:span text:style-name="Source_20_Text">Timer</text:span> for UDP sending.</text:p>
        </text:list-item>
        <text:list-item>
          <text:p text:style-name="P24"><text:span text:style-name="Strong_20_Emphasis">UDP Client</text:span>: <text:span text:style-name="Source_20_Text">System.Net.Sockets.UdpClient</text:span> is used for UDP communication.</text:p>
        </text:list-item>
        <text:list-item>
          <text:p text:style-name="P25"><text:span text:style-name="Strong_20_Emphasis">JSON Serialization</text:span>: <text:span text:style-name="Source_20_Text">System.Text.Json</text:span> (or <text:span text:style-name="Source_20_Text">Newtonsoft.Json</text:span>) is used to serialize the collected data into a JSON string.</text:p>
        </text:list-item>
      </text:list>
      <text:p text:style-name="P23"><text:span text:style-name="Strong_20_Emphasis">To make this C# code runnable:</text:span></text:p>
      <text:list text:style-name="L6">
        <text:list-item>
          <text:p text:style-name="P26"><text:span text:style-name="Strong_20_Emphasis">Create a New C# Console Application Project</text:span> in Visual Studio.</text:p>
        </text:list-item>
        <text:list-item>
          <text:p text:style-name="P26"><text:span text:style-name="Strong_20_Emphasis">Add SimConnect Reference</text:span>:</text:p>
          <text:list>
            <text:list-item>
              <text:p text:style-name="P26">Right-click on your project in Solution Explorer -&gt; "Add" -&gt; "Project Reference...".</text:p>
            </text:list-item>
            <text:list-item>
              <text:p text:style-name="P26">Browse to the location of <text:span text:style-name="Source_20_Text">Microsoft.FlightSimulator.SimConnect.dll</text:span>. This DLL is part of the Microsoft Flight Simulator SDK. You'll typically find it in a path like <text:span text:style-name="Source_20_Text">C:\MSFS SDK\SimConnect SDK\lib\Microsoft.FlightSimulator.SimConnect.dll</text:span>. If you don't have the SDK, you'll need to install it or locate this DLL from your MSFS installation (though the SDK version is preferred for development). <text:s/><text:span text:style-name="T13">NOTE THIS IS NOT A REFERENCE TO THE SIMCONNECT.DLL BUT THE UNDER ..\LIB\MANAGED</text:span></text:p>
            </text:list-item>
          </text:list>
        </text:list-item>
      </text:list>
      <text:p text:style-name="P27"/>
      <text:p text:style-name="P27"><draw:frame draw:style-name="fr2" draw:name="Image1" text:anchor-type="char" svg:width="6.5in" svg:height="1.0728in" draw:z-index="0"><draw:image xlink:href="Pictures/1000000000000270000000670B8F4323.png" xlink:type="simple" xlink:show="embed" xlink:actuate="onLoad" draw:mime-type="image/png"/></draw:frame></text:p>
      <text:p text:style-name="P27"><text:span text:style-name="Strong_20_Emphasis">If</text:span><text:span text:style-name="Strong_20_Emphasis"><text:span text:style-name="T14"> you select the simconnect.dll itself</text:span></text:span></text:p>
      <text:p text:style-name="P27"><text:span text:style-name="Strong_20_Emphasis"/></text:p>
      <text:p text:style-name="P27"><text:span text:style-name="Strong_20_Emphasis"><text:span text:style-name="T15"/></text:span></text:p>
      <text:p text:style-name="P28"><text:soft-page-break/><text:span text:style-name="Strong_20_Emphasis"><text:span text:style-name="T16">Aslo need to update project propoerties to copy simconnect.dll from the SDK to the output directory.</text:span></text:span></text:p>
      <text:p text:style-name="P28"><text:span text:style-name="Strong_20_Emphasis"/></text:p>
      <text:p text:style-name="P29"><text:span text:style-name="Strong_20_Emphasis"><text:span text:style-name="T17">&lt;Project Sdk="Microsoft.NET.Sdk"&gt;</text:span></text:span></text:p>
      <text:p text:style-name="P29"><text:span text:style-name="Strong_20_Emphasis"><text:span text:style-name="T17"/></text:span></text:p>
      <text:p text:style-name="P29"><text:span text:style-name="Strong_20_Emphasis"><text:span text:style-name="T17"><text:s text:c="2"/>&lt;PropertyGroup&gt;</text:span></text:span></text:p>
      <text:p text:style-name="P29"><text:span text:style-name="Strong_20_Emphasis"><text:span text:style-name="T17"><text:s text:c="4"/>&lt;OutputType&gt;Exe&lt;/OutputType&gt;</text:span></text:span></text:p>
      <text:p text:style-name="P29"><text:span text:style-name="Strong_20_Emphasis"><text:span text:style-name="T17"><text:s text:c="4"/>&lt;TargetFramework&gt;net10.0&lt;/TargetFramework&gt;</text:span></text:span></text:p>
      <text:p text:style-name="P29"><text:span text:style-name="Strong_20_Emphasis"><text:span text:style-name="T17"><text:s text:c="4"/>&lt;ImplicitUsings&gt;enable&lt;/ImplicitUsings&gt;</text:span></text:span></text:p>
      <text:p text:style-name="P29"><text:span text:style-name="Strong_20_Emphasis"><text:span text:style-name="T17"><text:s text:c="4"/>&lt;Nullable&gt;enable&lt;/Nullable&gt;</text:span></text:span></text:p>
      <text:p text:style-name="P29"><text:span text:style-name="Strong_20_Emphasis"><text:span text:style-name="T17"><text:s text:c="4"/>&lt;Platforms&gt;x64&lt;/Platforms&gt;</text:span></text:span></text:p>
      <text:p text:style-name="P29"><text:span text:style-name="Strong_20_Emphasis"><text:span text:style-name="T17"><text:tab/>&lt;PlatformTarget&gt;x64&lt;/PlatformTarget&gt;</text:span></text:span></text:p>
      <text:p text:style-name="P29"><text:span text:style-name="Strong_20_Emphasis"><text:span text:style-name="T17"><text:s text:c="2"/>&lt;/PropertyGroup&gt;</text:span></text:span></text:p>
      <text:p text:style-name="P29"><text:span text:style-name="Strong_20_Emphasis"><text:span text:style-name="T17"/></text:span></text:p>
      <text:p text:style-name="P29"><text:span text:style-name="Strong_20_Emphasis"><text:span text:style-name="T17"><text:s text:c="2"/>&lt;ItemGroup&gt;</text:span></text:span></text:p>
      <text:p text:style-name="P29"><text:span text:style-name="Strong_20_Emphasis"><text:span text:style-name="T17"><text:s text:c="4"/>&lt;Reference Include="Microsoft.FlightSimulator.SimConnect"&gt;</text:span></text:span></text:p>
      <text:p text:style-name="P29"><text:span text:style-name="Strong_20_Emphasis"><text:span text:style-name="T17"><text:s text:c="6"/>&lt;HintPath&gt;C:\MSFS 2024 SDK\SimConnect SDK\lib\managed\Microsoft.FlightSimulator.SimConnect.dll&lt;/HintPath&gt;</text:span></text:span></text:p>
      <text:p text:style-name="P29"><text:span text:style-name="Strong_20_Emphasis"><text:span text:style-name="T17"><text:s text:c="4"/>&lt;/Reference&gt;</text:span></text:span></text:p>
      <text:p text:style-name="P29"><text:span text:style-name="Strong_20_Emphasis"><text:span text:style-name="T17"><text:s text:c="2"/>&lt;/ItemGroup&gt;</text:span></text:span></text:p>
      <text:p text:style-name="P29"><text:span text:style-name="Strong_20_Emphasis"><text:span text:style-name="T17"><text:s text:c="2"/></text:span></text:span></text:p>
      <text:p text:style-name="P29"><text:span text:style-name="Strong_20_Emphasis"><text:span text:style-name="T17"><text:s text:c="2"/>&lt;ItemGroup&gt;</text:span></text:span></text:p>
      <text:p text:style-name="P29"><text:span text:style-name="Strong_20_Emphasis"><text:span text:style-name="T17"><text:s text:c="2"/>&lt;None Include="C:\MSFS 2024 SDK\SimConnect SDK\lib\SimConnect.dll"&gt;</text:span></text:span></text:p>
      <text:p text:style-name="P29"><text:span text:style-name="Strong_20_Emphasis"><text:span text:style-name="T17"><text:s text:c="4"/>&lt;CopyToOutputDirectory&gt;PreserveNewest&lt;/CopyToOutputDirectory&gt;</text:span></text:span></text:p>
      <text:p text:style-name="P29"><text:span text:style-name="Strong_20_Emphasis"><text:span text:style-name="T17"><text:s text:c="2"/>&lt;/None&gt;</text:span></text:span></text:p>
      <text:p text:style-name="P29"><text:span text:style-name="Strong_20_Emphasis"><text:span text:style-name="T17">&lt;/ItemGroup&gt;</text:span></text:span></text:p>
      <text:p text:style-name="P29"><text:span text:style-name="Strong_20_Emphasis"><text:span text:style-name="T17"/></text:span></text:p>
      <text:p text:style-name="P29"><text:span text:style-name="Strong_20_Emphasis"><text:span text:style-name="T17"/></text:span></text:p>
      <text:p text:style-name="P29"><text:span text:style-name="Strong_20_Emphasis"><text:span text:style-name="T17">&lt;/Project&gt;</text:span></text:span></text:p>
      <text:p text:style-name="P28"><text:span text:style-name="Strong_20_Emphasis"/></text:p>
      <text:p text:style-name="P28"><text:span text:style-name="Strong_20_Emphasis"/></text:p>
      <text:p text:style-name="P27"><text:span text:style-name="Strong_20_Emphasis"/></text:p>
      <text:list text:continue-numbering="true" text:style-name="L6">
        <text:list-item>
          <text:p text:style-name="P26"><text:span text:style-name="Strong_20_Emphasis">Add </text:span><text:span text:style-name="Strong_20_Emphasis"><text:span text:style-name="Source_20_Text">System.Text.Json</text:span></text:span>: This is usually included in modern .NET projects. If not, add it as a NuGet package.</text:p>
        </text:list-item>
        <text:list-item>
          <text:p text:style-name="P26"><text:span text:style-name="Strong_20_Emphasis">Copy and Paste the Code</text:span>: Replace the contents of <text:span text:style-name="Source_20_Text">Program.cs</text:span> with the provided C# code.</text:p>
        </text:list-item>
        <text:list-item>
          <text:p text:style-name="P26"><text:span text:style-name="Strong_20_Emphasis">Adjust UDP IP/Port</text:span>: Ensure <text:span text:style-name="Source_20_Text">UdpIp</text:span> and <text:span text:style-name="Source_20_Text">UdpPort</text:span> match your Python UDP listener or Arduino receiver.</text:p>
        </text:list-item>
        <text:list-item>
          <text:p text:style-name="P30"><text:span text:style-name="Strong_20_Emphasis">Build and Run</text:span>: Build the project, then run it.</text:p>
        </text:list-item>
      </text:list>
      <text:p text:style-name="P23"/>
      <text:p text:style-name="P31">Back to P3D</text:p>
      <text:p text:style-name="P32"/>
      <text:p text:style-name="P32">Installed P3d SK - </text:p>
      <text:p text:style-name="Standard">C:\Program Files\Lockheed Martin\Prepar3D v6 SDK 6.1.10.31609</text:p>
      <text:p text:style-name="Standard"/>
      <text:p text:style-name="P33">On opening project asked to upgrade a number of projects</text:p>
      <text:p text:style-name="P3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nsolas" svg:font-family="Consolas, 'Courier New', monospace"/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AU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5T05:49:09.375933993</meta:creation-date>
    <dc:date>2026-06-28T16:02:59.583330900</dc:date>
    <meta:editing-duration>PT5H46M27S</meta:editing-duration>
    <meta:editing-cycles>15</meta:editing-cycles>
    <meta:generator>LibreOffice/25.8.7.3$Windows_X86_64 LibreOffice_project/30742500f2d3eb4366ac312fa33d3dcabdb3eba5</meta:generator>
    <meta:document-statistic meta:table-count="1" meta:image-count="2" meta:object-count="0" meta:page-count="6" meta:paragraph-count="133" meta:word-count="715" meta:character-count="5101" meta:non-whitespace-character-count="4481"/>
  </office:meta>
</office:document-meta>
</file>