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TitleStyle" style:family="paragraph" style:display-name="TitleStyle">
      <style:text-properties fo:font-size="26pt" fo:font-weight="bold" fo:color="#1F3864"/>
      <style:paragraph-properties fo:margin-bottom="0.15in"/>
    </style:style>
    <style:style style:name="SubTitleStyle" style:family="paragraph" style:display-name="SubTitleStyle">
      <style:text-properties fo:font-size="13pt" fo:color="#444444" fo:font-style="italic"/>
      <style:paragraph-properties fo:margin-bottom="0.35in"/>
    </style:style>
    <style:style style:name="H1Style" style:family="paragraph" style:display-name="H1Style">
      <style:text-properties fo:font-size="20pt" fo:font-weight="bold" fo:color="#1F3864"/>
      <style:paragraph-properties fo:margin-top="0.35in" fo:margin-bottom="0.15in" fo:break-before="page"/>
    </style:style>
    <style:style style:name="H2Style" style:family="paragraph" style:display-name="H2Style">
      <style:text-properties fo:font-size="16pt" fo:font-weight="bold" fo:color="#2E5395"/>
      <style:paragraph-properties fo:margin-top="0.3in" fo:margin-bottom="0.1in"/>
    </style:style>
    <style:style style:name="BodyStyle" style:family="paragraph" style:display-name="BodyStyle">
      <style:text-properties fo:font-size="10.5pt"/>
      <style:paragraph-properties fo:margin-bottom="0.08in" fo:line-height="130%"/>
    </style:style>
    <style:style style:name="NoteStyle" style:family="paragraph" style:display-name="NoteStyle">
      <style:text-properties fo:font-size="10.5pt" fo:font-style="italic" fo:color="#555555"/>
      <style:paragraph-properties fo:margin-left="0.25in" fo:margin-bottom="0.08in" fo:border-left="0.03in solid #999999" fo:padding-left="0.1in"/>
    </style:style>
    <style:style style:name="ListParaStyle" style:family="paragraph" style:display-name="ListParaStyle">
      <style:text-properties fo:font-size="10.5pt"/>
      <style:paragraph-properties fo:margin-bottom="0.04in"/>
    </style:style>
    <style:style style:name="CodeChar" style:family="text" style:display-name="CodeChar">
      <style:text-properties fo:font-family="Consolas" fo:font-size="9.5pt" fo:color="#7A0E7A"/>
    </style:style>
    <style:style style:name="BoldChar" style:family="text" style:display-name="BoldChar">
      <style:text-properties fo:font-weight="bold"/>
    </style:style>
    <style:style style:name="SummaryTable" style:family="table" style:display-name="SummaryTable">
      <style:table-properties style:width="6.8in" table:align="margins"/>
    </style:style>
    <style:style style:name="SummaryTableCol" style:family="table-column" style:display-name="SummaryTableCol">
      <style:table-column-properties style:column-width="1.5in"/>
    </style:style>
    <style:style style:name="SummaryTableHeadCell" style:family="table-cell" style:display-name="SummaryTableHeadCell">
      <style:table-cell-properties fo:border="0.01in solid #666666" fo:background-color="#DCE6F1" fo:padding="0.05in"/>
    </style:style>
    <style:style style:name="SummaryTableDataCell" style:family="table-cell" style:display-name="SummaryTableDataCell">
      <style:table-cell-properties fo:border="0.01in solid #999999" fo:padding="0.05in"/>
    </style:style>
  </office:automatic-styles>
  <office:body>
    <office:text>
      <text:p text:style-name="TitleStyle">Jet Ranger Arduino &amp; C# Program Documentation</text:p>
      <text:p text:style-name="SubTitleStyle">Consolidated program-flow, pin/offset, and network summary for every active Arduino sketch and C# application in the Jet Ranger cockpit build. Generated from the per-project PROGRAM_SUMMARY.md documentation; retired/archived code is excluded.</text:p>
      <text:h text:outline-level="1" text:style-name="TitleStyle">Network &amp; Communication Overview</text:h>
      <text:p text:style-name="BodyStyle">The panel runs two independent generations of network protocol. The current fleet (all six active Arduino sketches plus the PC-side bridge apps) uses a fixed 172.16.1.0/24 LAN with the simple text protocols described per-project below. A separate, older 2014-era prototype set ("V1 C# Projects") used serial ports and a different DCS Export.lua/SIOC/UDP scheme on loopback and is not part of the running system.</text:p>
      <text:h text:outline-level="2" text:style-name="H1Style">Current fleet — devices and IP addresses</text:h>
      <table:table table:name="Table1"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Component</text:p>
          </table:table-cell>
          <table:table-cell table:style-name="SummaryTableHeadCell">
            <text:p>Type</text:p>
          </table:table-cell>
          <table:table-cell table:style-name="SummaryTableHeadCell">
            <text:p>IP address</text:p>
          </table:table-cell>
          <table:table-cell table:style-name="SummaryTableHeadCell">
            <text:p>Local ports (listen)</text:p>
          </table:table-cell>
        </table:table-row>
        <table:table-row>
          <table:table-cell table:style-name="SummaryTableDataCell">
            <text:p>JET_RANGER_RADIO_CONTROLLER</text:p>
          </table:table-cell>
          <table:table-cell table:style-name="SummaryTableDataCell">
            <text:p>Arduino Mega</text:p>
          </table:table-cell>
          <table:table-cell table:style-name="SummaryTableDataCell">
            <text:p>172.16.1.101</text:p>
          </table:table-cell>
          <table:table-cell table:style-name="SummaryTableDataCell">
            <text:p>7788, 7789, 13136, 13137</text:p>
          </table:table-cell>
        </table:table-row>
        <table:table-row>
          <table:table-cell table:style-name="SummaryTableDataCell">
            <text:p>JET_RANGER_SERVO_CONTROLLER</text:p>
          </table:table-cell>
          <table:table-cell table:style-name="SummaryTableDataCell">
            <text:p>Arduino Mega</text:p>
          </table:table-cell>
          <table:table-cell table:style-name="SummaryTableDataCell">
            <text:p>172.16.1.102</text:p>
          </table:table-cell>
          <table:table-cell table:style-name="SummaryTableDataCell">
            <text:p>7788, 7795, 13136, 13137</text:p>
          </table:table-cell>
        </table:table-row>
        <table:table-row>
          <table:table-cell table:style-name="SummaryTableDataCell">
            <text:p>JET_RANGER_UPPER_CONTROLLER</text:p>
          </table:table-cell>
          <table:table-cell table:style-name="SummaryTableDataCell">
            <text:p>Arduino Mega</text:p>
          </table:table-cell>
          <table:table-cell table:style-name="SummaryTableDataCell">
            <text:p>172.16.1.103</text:p>
          </table:table-cell>
          <table:table-cell table:style-name="SummaryTableDataCell">
            <text:p>7788, 13137</text:p>
          </table:table-cell>
        </table:table-row>
        <table:table-row>
          <table:table-cell table:style-name="SummaryTableDataCell">
            <text:p>UDP_TO_HID</text:p>
          </table:table-cell>
          <table:table-cell table:style-name="SummaryTableDataCell">
            <text:p>Arduino (native USB HID)</text:p>
          </table:table-cell>
          <table:table-cell table:style-name="SummaryTableDataCell">
            <text:p>172.16.1.11</text:p>
          </table:table-cell>
          <table:table-cell table:style-name="SummaryTableDataCell">
            <text:p>4210</text:p>
          </table:table-cell>
        </table:table-row>
        <table:table-row>
          <table:table-cell table:style-name="SummaryTableDataCell">
            <text:p>Reflector / health-monitor host</text:p>
          </table:table-cell>
          <table:table-cell table:style-name="SummaryTableDataCell">
            <text:p>PC (runs JetRangerHealthMonitor)</text:p>
          </table:table-cell>
          <table:table-cell table:style-name="SummaryTableDataCell">
            <text:p>172.16.1.10</text:p>
          </table:table-cell>
          <table:table-cell table:style-name="SummaryTableDataCell">
            <text:p>13137 (health monitor); 27000 debug — no listener found in this repo; 27001 (whichever sim bridge is running)</text:p>
          </table:table-cell>
        </table:table-row>
        <table:table-row>
          <table:table-cell table:style-name="SummaryTableDataCell">
            <text:p>P3D_to_UDP / SimConnect_to_UDP / MSFSSimConnectExtractor / FSUIPCWinformsAutoCS</text:p>
          </table:table-cell>
          <table:table-cell table:style-name="SummaryTableDataCell">
            <text:p>PC WinForms (run one at a time)</text:p>
          </table:table-cell>
          <table:table-cell table:style-name="SummaryTableDataCell">
            <text:p>172.16.1.10 (presumed)</text:p>
          </table:table-cell>
          <table:table-cell table:style-name="SummaryTableDataCell">
            <text:p>27001</text:p>
          </table:table-cell>
        </table:table-row>
        <table:table-row>
          <table:table-cell table:style-name="SummaryTableDataCell">
            <text:p>DataReceiver (prototype, separate subnet)</text:p>
          </table:table-cell>
          <table:table-cell table:style-name="SummaryTableDataCell">
            <text:p>Arduino Mega/Uno</text:p>
          </table:table-cell>
          <table:table-cell table:style-name="SummaryTableDataCell">
            <text:p>192.168.1.177</text:p>
          </table:table-cell>
          <table:table-cell table:style-name="SummaryTableDataCell">
            <text:p>5005</text:p>
          </table:table-cell>
        </table:table-row>
      </table:table>
      <text:p text:style-name="BodyStyle"/>
      <text:h text:outline-level="2" text:style-name="H1Style">Current fleet — who talks to whom</text:h>
      <table:table table:name="Table2"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From</text:p>
          </table:table-cell>
          <table:table-cell table:style-name="SummaryTableHeadCell">
            <text:p>To</text:p>
          </table:table-cell>
          <table:table-cell table:style-name="SummaryTableHeadCell">
            <text:p>Port</text:p>
          </table:table-cell>
          <table:table-cell table:style-name="SummaryTableHeadCell">
            <text:p>Purpose</text:p>
          </table:table-cell>
        </table:table-row>
        <table:table-row>
          <table:table-cell table:style-name="SummaryTableDataCell">
            <text:p>Radio Controller</text:p>
          </table:table-cell>
          <table:table-cell table:style-name="SummaryTableDataCell">
            <text:p>172.16.1.10 (reflector)</text:p>
          </table:table-cell>
          <table:table-cell table:style-name="SummaryTableDataCell">
            <text:p>27000 / 13137 / 27001</text:p>
          </table:table-cell>
          <table:table-cell table:style-name="SummaryTableDataCell">
            <text:p>Debug log / keepalive "COMM_NAV" / standby-freq &amp; radio-swap-battery-alternator commands</text:p>
          </table:table-cell>
        </table:table-row>
        <table:table-row>
          <table:table-cell table:style-name="SummaryTableDataCell">
            <text:p>Servo Controller</text:p>
          </table:table-cell>
          <table:table-cell table:style-name="SummaryTableDataCell">
            <text:p>172.16.1.10 (reflector)</text:p>
          </table:table-cell>
          <table:table-cell table:style-name="SummaryTableDataCell">
            <text:p>27000 / 13137</text:p>
          </table:table-cell>
          <table:table-cell table:style-name="SummaryTableDataCell">
            <text:p>Debug log / keepalive "SERVO"</text:p>
          </table:table-cell>
        </table:table-row>
        <table:table-row>
          <table:table-cell table:style-name="SummaryTableDataCell">
            <text:p>Upper Controller</text:p>
          </table:table-cell>
          <table:table-cell table:style-name="SummaryTableDataCell">
            <text:p>172.16.1.10 (reflector); 172.16.1.11 (UDP_TO_HID)</text:p>
          </table:table-cell>
          <table:table-cell table:style-name="SummaryTableDataCell">
            <text:p>27000 / 13137; 4210</text:p>
          </table:table-cell>
          <table:table-cell table:style-name="SummaryTableDataCell">
            <text:p>Debug log / keepalive "UPPER_INPUT"; button &amp; key events</text:p>
          </table:table-cell>
        </table:table-row>
        <table:table-row>
          <table:table-cell table:style-name="SummaryTableDataCell">
            <text:p>UDP_TO_HID</text:p>
          </table:table-cell>
          <table:table-cell table:style-name="SummaryTableDataCell">
            <text:p>172.16.1.10 (reflector)</text:p>
          </table:table-cell>
          <table:table-cell table:style-name="SummaryTableDataCell">
            <text:p>27000 / 13137</text:p>
          </table:table-cell>
          <table:table-cell table:style-name="SummaryTableDataCell">
            <text:p>Log messages / keepalive "JOYSTICK"</text:p>
          </table:table-cell>
        </table:table-row>
        <table:table-row>
          <table:table-cell table:style-name="SummaryTableDataCell">
            <text:p>Sim-bridge app (whichever is running)</text:p>
          </table:table-cell>
          <table:table-cell table:style-name="SummaryTableDataCell">
            <text:p>172.16.1.101; 172.16.1.102</text:p>
          </table:table-cell>
          <table:table-cell table:style-name="SummaryTableDataCell">
            <text:p>13136; 13136</text:p>
          </table:table-cell>
          <table:table-cell table:style-name="SummaryTableDataCell">
            <text:p>Radio/bus-voltage data; instrument/servo data</text:p>
          </table:table-cell>
        </table:table-row>
        <table:table-row>
          <table:table-cell table:style-name="SummaryTableDataCell">
            <text:p>Radio/Upper Controller</text:p>
          </table:table-cell>
          <table:table-cell table:style-name="SummaryTableDataCell">
            <text:p>Sim-bridge app</text:p>
          </table:table-cell>
          <table:table-cell table:style-name="SummaryTableDataCell">
            <text:p>27001</text:p>
          </table:table-cell>
          <table:table-cell table:style-name="SummaryTableDataCell">
            <text:p>Radio-swap, battery, alternator, standby-frequency commands</text:p>
          </table:table-cell>
        </table:table-row>
        <table:table-row>
          <table:table-cell table:style-name="SummaryTableDataCell">
            <text:p>ServoTuner (manual calibration tool)</text:p>
          </table:table-cell>
          <table:table-cell table:style-name="SummaryTableDataCell">
            <text:p>172.16.1.102</text:p>
          </table:table-cell>
          <table:table-cell table:style-name="SummaryTableDataCell">
            <text:p>13136</text:p>
          </table:table-cell>
          <table:table-cell table:style-name="SummaryTableDataCell">
            <text:p>Manual/converted test servo positions</text:p>
          </table:table-cell>
        </table:table-row>
        <table:table-row>
          <table:table-cell table:style-name="SummaryTableDataCell">
            <text:p>JetRangerHealthMonitor</text:p>
          </table:table-cell>
          <table:table-cell table:style-name="SummaryTableDataCell">
            <text:p>(listens only)</text:p>
          </table:table-cell>
          <table:table-cell table:style-name="SummaryTableDataCell">
            <text:p>13137</text:p>
          </table:table-cell>
          <table:table-cell table:style-name="SummaryTableDataCell">
            <text:p>Keepalive dashboard for all four boards</text:p>
          </table:table-cell>
        </table:table-row>
      </table:table>
      <text:p text:style-name="BodyStyle">Known open item: nothing in this repository's C# code listens on 172.16.1.10:27000, so the debug-log stream from four of the sketches currently has no consumer.</text:p>
      <text:h text:outline-level="1" text:style-name="TitleStyle">Part 1 — Arduino Sketches</text:h>
      <text:p text:style-name="BodyStyle">Covers every sketch folder in "Jet Ranger Arduino Sketches" except the retired/ directory.</text:p>
      <text:h text:outline-level="2" text:style-name="H1Style">JET_RANGER_RADIO_CONTROLLER — Program Summary</text:h>
      <text:p text:style-name="BodyStyle">Arduino Mega 2560 + W5500 Ethernet shield. Drives the two COM/NAV OLED frequency displays, reads 8 rotary encoders (COM1/COM2/NAV1/NAV2 major &amp; minor) and a 4x4 button matrix, and keeps the radio panel in sync with the flight sim over Ethernet.</text:p>
      <text:h text:outline-level="3" text:style-name="H2Style">Program flow</text:h>
      <text:p text:style-name="BodyStyle">1. <text:span text:style-name="BoldChar">Setup</text:span></text:p>
      <text:list>
        <text:list-item>
          <text:p text:style-name="ListParaStyle">Resets the W5500 shield via <text:span text:style-name="CodeChar">ES1_RESET_PIN</text:span> (53), then <text:span text:style-name="CodeChar">Ethernet.begin(mac, ip)</text:span>.</text:p>
        </text:list-item>
        <text:list-item>
          <text:p text:style-name="ListParaStyle">Opens the four UDP sockets listed below, flashes the red status LED while it waits <text:span text:style-name="CodeChar">delayBeforeSendingPacket</text:span> (3s) for the link to settle, then sends a debug "Ethernet Started" message.</text:p>
        </text:list-item>
        <text:list-item>
          <text:p text:style-name="ListParaStyle">Initialises the two character OLEDs (via the TCA9548 I2C mux) and the 8 rotary encoders (acceleration enabled, start positions set).</text:p>
        </text:list-item>
        <text:list-item>
          <text:p text:style-name="ListParaStyle">Initialises the 4x4 keypad matrix scanner.</text:p>
        </text:list-item>
      </text:list>
      <text:p text:style-name="BodyStyle">2. <text:span text:style-name="BoldChar">Main loop</text:span> (<text:span text:style-name="CodeChar">loop()</text:span>)</text:p>
      <text:list>
        <text:list-item>
          <text:p text:style-name="ListParaStyle">Toggles the green/red status LEDs every <text:span text:style-name="CodeChar">FLASH_TIME</text:span> (200ms) as a heartbeat indicator.</text:p>
        </text:list-item>
        <text:list-item>
          <text:p text:style-name="ListParaStyle">Every 10s sends a <text:span text:style-name="CodeChar">"COMM_NAV"</text:span> keepalive UDP packet to the reflector (health monitor).</text:p>
        </text:list-item>
        <text:list-item>
          <text:p text:style-name="ListParaStyle">Polls all 8 encoders; any change recalculates the relevant standby frequency, sends it to the reflector, and refreshes the OLEDs.</text:p>
        </text:list-item>
        <text:list-item>
          <text:p text:style-name="ListParaStyle">Scans the 4x4 matrix; key presses on row 0–3 col 0 trigger COM1/COM2 swap, master battery on/off and alternator on/off commands sent to the reflector on port 27001. Other keys are only logged via <text:span text:style-name="CodeChar">SendDebug</text:span>.</text:p>
        </text:list-item>
        <text:list-item>
          <text:p text:style-name="ListParaStyle">Reads any pending UDP packet on the MSFS port and passes it to <text:span text:style-name="CodeChar">ProcessReceivedMSFSString()</text:span>, which parses a CSV-style payload (<text:span text:style-name="CodeChar">D,C1A:119.500,C1S:120.000,...</text:span> for data, <text:span text:style-name="CodeChar">C,B:5</text:span> for control/ brightness) and updates the active/standby frequencies, main bus voltage and NAVCOM1 power state, then refreshes the OLEDs if anything changed.</text:p>
        </text:list-item>
      </text:list>
      <text:h text:outline-level="3" text:style-name="H2Style">Pin usage</text:h>
      <table:table table:name="Table3"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50–52 (+10)</text:p>
          </table:table-cell>
          <table:table-cell table:style-name="SummaryTableDataCell">
            <text:p>SPI bus to W5500 shield (Mega ICSP header, reserved)</text:p>
          </table:table-cell>
        </table:table-row>
        <table:table-row>
          <table:table-cell table:style-name="SummaryTableDataCell">
            <text:p>I2C (SDA/SCL)</text:p>
          </table:table-cell>
          <table:table-cell table:style-name="SummaryTableDataCell">
            <text:p>TCA9548 I2C multiplexer (addr <text:span text:style-name="CodeChar">0x70</text:span>), driving two OLEDs (addr <text:span text:style-name="CodeChar">0x3C</text:span>) — mux port 0 = NAV OLED, port 1 = COMM OLED</text:p>
          </table:table-cell>
        </table:table-row>
        <table:table-row>
          <table:table-cell table:style-name="SummaryTableDataCell">
            <text:p>31, 30</text:p>
          </table:table-cell>
          <table:table-cell table:style-name="SummaryTableDataCell">
            <text:p>Comm1 Major rotary encoder (A, B)</text:p>
          </table:table-cell>
        </table:table-row>
        <table:table-row>
          <table:table-cell table:style-name="SummaryTableDataCell">
            <text:p>33, 32</text:p>
          </table:table-cell>
          <table:table-cell table:style-name="SummaryTableDataCell">
            <text:p>Comm1 Minor rotary encoder (A, B)</text:p>
          </table:table-cell>
        </table:table-row>
        <table:table-row>
          <table:table-cell table:style-name="SummaryTableDataCell">
            <text:p>34, 35</text:p>
          </table:table-cell>
          <table:table-cell table:style-name="SummaryTableDataCell">
            <text:p>Comm2 Major rotary encoder (A, B)</text:p>
          </table:table-cell>
        </table:table-row>
        <table:table-row>
          <table:table-cell table:style-name="SummaryTableDataCell">
            <text:p>37, 36</text:p>
          </table:table-cell>
          <table:table-cell table:style-name="SummaryTableDataCell">
            <text:p>Comm2 Minor rotary encoder (A, B)</text:p>
          </table:table-cell>
        </table:table-row>
        <table:table-row>
          <table:table-cell table:style-name="SummaryTableDataCell">
            <text:p>38, 39</text:p>
          </table:table-cell>
          <table:table-cell table:style-name="SummaryTableDataCell">
            <text:p>Nav1 Major rotary encoder (A, B)</text:p>
          </table:table-cell>
        </table:table-row>
        <table:table-row>
          <table:table-cell table:style-name="SummaryTableDataCell">
            <text:p>41, 40</text:p>
          </table:table-cell>
          <table:table-cell table:style-name="SummaryTableDataCell">
            <text:p>Nav1 Minor rotary encoder (A, B)</text:p>
          </table:table-cell>
        </table:table-row>
        <table:table-row>
          <table:table-cell table:style-name="SummaryTableDataCell">
            <text:p>42, 43</text:p>
          </table:table-cell>
          <table:table-cell table:style-name="SummaryTableDataCell">
            <text:p>Nav2 Major rotary encoder (A, B)</text:p>
          </table:table-cell>
        </table:table-row>
        <table:table-row>
          <table:table-cell table:style-name="SummaryTableDataCell">
            <text:p>45, 44</text:p>
          </table:table-cell>
          <table:table-cell table:style-name="SummaryTableDataCell">
            <text:p>Nav2 Minor rotary encoder (A, B)</text:p>
          </table:table-cell>
        </table:table-row>
        <table:table-row>
          <table:table-cell table:style-name="SummaryTableDataCell">
            <text:p>22–25</text:p>
          </table:table-cell>
          <table:table-cell table:style-name="SummaryTableDataCell">
            <text:p>4x4 keypad matrix rows</text:p>
          </table:table-cell>
        </table:table-row>
        <table:table-row>
          <table:table-cell table:style-name="SummaryTableDataCell">
            <text:p>26–29</text:p>
          </table:table-cell>
          <table:table-cell table:style-name="SummaryTableDataCell">
            <text:p>4x4 keypad matrix columns</text:p>
          </table:table-cell>
        </table:table-row>
      </table:table>
      <text:h text:outline-level="3" text:style-name="H2Style">Local network configuration</text:h>
      <table:table table:name="Table4"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1</text:span></text:p>
          </table:table-cell>
        </table:table-row>
        <table:table-row>
          <table:table-cell table:style-name="SummaryTableDataCell">
            <text:p>MAC</text:p>
          </table:table-cell>
          <table:table-cell table:style-name="SummaryTableDataCell">
            <text:p><text:span text:style-name="CodeChar">A8:61:0A:9E:83:01</text:span></text:p>
          </table:table-cell>
        </table:table-row>
        <table:table-row>
          <table:table-cell table:style-name="SummaryTableDataCell">
            <text:p>Subnet role</text:p>
          </table:table-cell>
          <table:table-cell table:style-name="SummaryTableDataCell">
            <text:p>Fixed on the <text:span text:style-name="CodeChar">172.16.1.0/24</text:span> avionics LAN</text:p>
          </table:table-cell>
        </table:table-row>
        <table:table-row>
          <table:table-cell table:style-name="SummaryTableDataCell">
            <text:p>Local port <text:span text:style-name="CodeChar">localport</text:span></text:p>
          </table:table-cell>
          <table:table-cell table:style-name="SummaryTableDataCell">
            <text:p>7788 (bound, used as the source socket for outbound debug/command packets)</text:p>
          </table:table-cell>
        </table:table-row>
        <table:table-row>
          <table:table-cell table:style-name="SummaryTableDataCell">
            <text:p>Local port <text:span text:style-name="CodeChar">localdebugport</text:span></text:p>
          </table:table-cell>
          <table:table-cell table:style-name="SummaryTableDataCell">
            <text:p>7789 (bound, currently unused for send/receive)</text:p>
          </table:table-cell>
        </table:table-row>
        <table:table-row>
          <table:table-cell table:style-name="SummaryTableDataCell">
            <text:p>Local port <text:span text:style-name="CodeChar">MSFSport</text:span></text:p>
          </table:table-cell>
          <table:table-cell table:style-name="SummaryTableDataCell">
            <text:p>13136 (listens for sim data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ext:span text:style-name="CodeChar">JET_RANGER_UPPER_CONTROLLER</text:span> previously hard-coded this same IP (<text:span text:style-name="CodeChar">172.16.1.101</text:span>) and MAC. It has been renumbered to <text:span text:style-name="CodeChar">172.16.1.103</text:span> / MAC <text:span text:style-name="CodeChar">...83:03</text:span>, so this address is now unique to the Radio Controller.</text:p>
      <text:h text:outline-level="3" text:style-name="H2Style">Remote endpoints this sketch talks to</text:h>
      <table:table table:name="Table5"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COMM_NAV"</text:span></text:p>
          </table:table-cell>
        </table:table-row>
        <table:table-row>
          <table:table-cell table:style-name="SummaryTableDataCell">
            <text:p><text:span text:style-name="CodeChar">172.16.1.10</text:span> (reflector host)</text:p>
          </table:table-cell>
          <table:table-cell table:style-name="SummaryTableDataCell">
            <text:p>27001</text:p>
          </table:table-cell>
          <table:table-cell table:style-name="SummaryTableDataCell">
            <text:p>Standby-frequency updates and radio/battery/alternator control commands (<text:span text:style-name="CodeChar">COM1_RADIO_SWAP</text:span>, <text:span text:style-name="CodeChar">COM2_RADIO_SWAP</text:span>, <text:span text:style-name="CodeChar">MASTER_BATTERY_ON/OFF</text:span>, <text:span text:style-name="CodeChar">ALTERNATOR_ON/OFF</text:span>)</text:p>
          </table:table-cell>
        </table:table-row>
      </table:table>
      <text:h text:outline-level="3" text:style-name="H2Style">C# programs this sketch communicates with</text:h>
      <text:list>
        <text:list-item>
          <text:p text:style-name="ListParaStyle"><text:span text:style-name="BoldChar">P3D_to_UDP</text:span> / <text:span text:style-name="BoldChar">SimConnect_to_UDP</text:span> / <text:span text:style-name="BoldChar">MSFSSimConnectExtractor (WindowsFormsApp2)</text:span> — these are the sim-specific variants of the same SimConnect↔UDP bridge, normally run on the PC at <text:span text:style-name="CodeChar">172.16.1.10</text:span>. They listen on UDP <text:span text:style-name="BoldChar">27001</text:span> for the control commands this sketch sends (radio swap, battery, alternator) and translate them into SimConnect events, and they send the <text:span text:style-name="CodeChar">D,C1A:...</text:span> / <text:span text:style-name="CodeChar">C,...</text:span> frequency/status packets this sketch listens for on port <text:span text:style-name="BoldChar">13136</text:span>.</text:p>
        </text:list-item>
        <text:list-item>
          <text:p text:style-name="ListParaStyle"><text:span text:style-name="BoldChar">JetRangerHealthMonitor</text:span> — listens on UDP <text:span text:style-name="BoldChar">13137</text:span> on the same PC and turns the "CommNav" indicator green when this sketch's keepalive arrives (red/orange if it's been 15–30s+ since the last one).</text:p>
        </text:list-item>
        <text:list-item>
          <text:p text:style-name="ListParaStyle">No C# project in this repository currently listens on <text:span text:style-name="CodeChar">172.16.1.10:27000</text:span> — the debug log stream (<text:span text:style-name="CodeChar">SendDebug</text:span>) has no in-repo consumer; it would need to be watched with a generic UDP listener/packet capture.</text:p>
        </text:list-item>
      </text:list>
      <text:h text:outline-level="2" text:style-name="H1Style">JET_RANGER_SERVO_CONTROLLER — Program Summary</text:h>
      <text:p text:style-name="BodyStyle">Arduino Mega 2560 + W5500 Ethernet shield. Drives 15 warning lamps and 15 analogue-gauge servos (airspeed, VSI, engine torque, oil pressure/temp, transmission pressure/temp, EGT, rotor/engine RPM, N1, fuel, fuel/electrical load, pitch/bank) from flight-sim data received over Ethernet.</text:p>
      <text:h text:outline-level="3" text:style-name="H2Style">Program flow</text:h>
      <text:p text:style-name="BodyStyle">1. <text:span text:style-name="BoldChar">Setup</text:span></text:p>
      <text:list>
        <text:list-item>
          <text:p text:style-name="ListParaStyle">Sets status LED pins, then calls <text:span text:style-name="CodeChar">InitialiseWarningLights()</text:span> which sets all 15 warning-lamp pins to <text:span text:style-name="CodeChar">OUTPUT</text:span> and turns them all on (lamp test).</text:p>
        </text:list-item>
        <text:list-item>
          <text:p text:style-name="ListParaStyle">Resets the W5500 shield, brings up Ethernet on the static IP, opens the UDP sockets below, and flashes the red LED for 3s while the link settles.</text:p>
        </text:list-item>
        <text:list-item>
          <text:p text:style-name="ListParaStyle">Runs a self-test/zero sequence: every servo is driven to its zero position, then swept from its minimum to maximum position and back (visible "wiggle test"), turning off one warning lamp after each servo's sweep completes as a visual progress indicator. All target positions are reset to the zero position at the end.</text:p>
        </text:list-item>
      </text:list>
      <text:p text:style-name="BodyStyle">2. <text:span text:style-name="BoldChar">Main loop</text:span> (<text:span text:style-name="CodeChar">loop()</text:span>)</text:p>
      <text:list>
        <text:list-item>
          <text:p text:style-name="ListParaStyle">Toggles the status LEDs every 200ms (heartbeat).</text:p>
        </text:list-item>
        <text:list-item>
          <text:p text:style-name="ListParaStyle">Sends a <text:span text:style-name="CodeChar">"SERVO"</text:span> keepalive to the reflector every 10s.</text:p>
        </text:list-item>
        <text:list-item>
          <text:p text:style-name="ListParaStyle">Every 5ms (<text:span text:style-name="CodeChar">incomingcheckinterval</text:span>), checks for an incoming UDP packet on the MSFS port and, if present, passes it to <text:span text:style-name="CodeChar">ProcessReceivedMSFSString()</text:span>, which parses the CSV payload (<text:span text:style-name="CodeChar">D,TQ:120,IAS:80,...</text:span> / <text:span text:style-name="CodeChar">C,B:5</text:span>) and updates:</text:p>
        </text:list-item>
        <text:list-item>
          <text:p text:style-name="ListParaStyle">15 servo <text:span text:style-name="BoldChar">target</text:span> positions (see <text:span text:style-name="CodeChar">HandleOutputValuePair</text:span>), and</text:p>
        </text:list-item>
        <text:list-item>
          <text:p text:style-name="ListParaStyle">15 boolean warning-light states, each driving its lamp pin directly.</text:p>
        </text:list-item>
        <text:list-item>
          <text:p text:style-name="ListParaStyle">Every 5ms (<text:span text:style-name="CodeChar">servoCheckInterval</text:span>), <text:span text:style-name="CodeChar">UpdateServoPos()</text:span> nudges each servo one step at a time from its current position towards its target (smooth, non-blocking motion), attaching each servo on first use. <text:span text:style-name="CodeChar">CheckServoIdleTime()</text:span> then detaches any servo that hasn't moved for 1s (<text:span text:style-name="CodeChar">ServoIdleTime</text:span>) to reduce jitter/power draw.</text:p>
        </text:list-item>
      </text:list>
      <text:h text:outline-level="3" text:style-name="H2Style">Pin usage</text:h>
      <table:table table:name="Table6"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2</text:p>
          </table:table-cell>
          <table:table-cell table:style-name="SummaryTableDataCell">
            <text:p>Airspeed servo</text:p>
          </table:table-cell>
        </table:table-row>
        <table:table-row>
          <table:table-cell table:style-name="SummaryTableDataCell">
            <text:p>3</text:p>
          </table:table-cell>
          <table:table-cell table:style-name="SummaryTableDataCell">
            <text:p>(Radar altitude — port reserved, not driven by a <text:span text:style-name="CodeChar">Set...</text:span> routine)</text:p>
          </table:table-cell>
        </table:table-row>
        <table:table-row>
          <table:table-cell table:style-name="SummaryTableDataCell">
            <text:p>4</text:p>
          </table:table-cell>
          <table:table-cell table:style-name="SummaryTableDataCell">
            <text:p>Vertical Speed (VSI) servo</text:p>
          </table:table-cell>
        </table:table-row>
        <table:table-row>
          <table:table-cell table:style-name="SummaryTableDataCell">
            <text:p>6</text:p>
          </table:table-cell>
          <table:table-cell table:style-name="SummaryTableDataCell">
            <text:p>Gas Producer / N1 servo</text:p>
          </table:table-cell>
        </table:table-row>
        <table:table-row>
          <table:table-cell table:style-name="SummaryTableDataCell">
            <text:p>7</text:p>
          </table:table-cell>
          <table:table-cell table:style-name="SummaryTableDataCell">
            <text:p>EGT / turbine ITT servo</text:p>
          </table:table-cell>
        </table:table-row>
        <table:table-row>
          <table:table-cell table:style-name="SummaryTableDataCell">
            <text:p>8</text:p>
          </table:table-cell>
          <table:table-cell table:style-name="SummaryTableDataCell">
            <text:p>Engine RPM (RPME) servo</text:p>
          </table:table-cell>
        </table:table-row>
        <table:table-row>
          <table:table-cell table:style-name="SummaryTableDataCell">
            <text:p>9</text:p>
          </table:table-cell>
          <table:table-cell table:style-name="SummaryTableDataCell">
            <text:p>Rotor RPM (RPMR) servo</text:p>
          </table:table-cell>
        </table:table-row>
        <table:table-row>
          <table:table-cell table:style-name="SummaryTableDataCell">
            <text:p>11</text:p>
          </table:table-cell>
          <table:table-cell table:style-name="SummaryTableDataCell">
            <text:p>Engine Torque servo</text:p>
          </table:table-cell>
        </table:table-row>
        <table:table-row>
          <table:table-cell table:style-name="SummaryTableDataCell">
            <text:p>12</text:p>
          </table:table-cell>
          <table:table-cell table:style-name="SummaryTableDataCell">
            <text:p>Oil Temp (OILT) servo</text:p>
          </table:table-cell>
        </table:table-row>
        <table:table-row>
          <table:table-cell table:style-name="SummaryTableDataCell">
            <text:p>13</text:p>
          </table:table-cell>
          <table:table-cell table:style-name="SummaryTableDataCell">
            <text:p>Oil Pressure (OILP) servo</text:p>
          </table:table-cell>
        </table:table-row>
        <table:table-row>
          <table:table-cell table:style-name="SummaryTableDataCell">
            <text:p>26</text:p>
          </table:table-cell>
          <table:table-cell table:style-name="SummaryTableDataCell">
            <text:p>Attitude Pitch servo</text:p>
          </table:table-cell>
        </table:table-row>
        <table:table-row>
          <table:table-cell table:style-name="SummaryTableDataCell">
            <text:p>27</text:p>
          </table:table-cell>
          <table:table-cell table:style-name="SummaryTableDataCell">
            <text:p>Attitude Bank/Roll servo</text:p>
          </table:table-cell>
        </table:table-row>
        <table:table-row>
          <table:table-cell table:style-name="SummaryTableDataCell">
            <text:p>28</text:p>
          </table:table-cell>
          <table:table-cell table:style-name="SummaryTableDataCell">
            <text:p>Electrical Load servo</text:p>
          </table:table-cell>
        </table:table-row>
        <table:table-row>
          <table:table-cell table:style-name="SummaryTableDataCell">
            <text:p>29</text:p>
          </table:table-cell>
          <table:table-cell table:style-name="SummaryTableDataCell">
            <text:p>Fuel Load servo</text:p>
          </table:table-cell>
        </table:table-row>
        <table:table-row>
          <table:table-cell table:style-name="SummaryTableDataCell">
            <text:p>44</text:p>
          </table:table-cell>
          <table:table-cell table:style-name="SummaryTableDataCell">
            <text:p>Transmission Temp (XMSNT) servo</text:p>
          </table:table-cell>
        </table:table-row>
        <table:table-row>
          <table:table-cell table:style-name="SummaryTableDataCell">
            <text:p>45</text:p>
          </table:table-cell>
          <table:table-cell table:style-name="SummaryTableDataCell">
            <text:p>Transmission Pressure (XMSNP) servo</text:p>
          </table:table-cell>
        </table:table-row>
        <table:table-row>
          <table:table-cell table:style-name="SummaryTableDataCell">
            <text:p>46</text:p>
          </table:table-cell>
          <table:table-cell table:style-name="SummaryTableDataCell">
            <text:p>Fuel Quantity servo</text:p>
          </table:table-cell>
        </table:table-row>
        <table:table-row>
          <table:table-cell table:style-name="SummaryTableDataCell">
            <text:p>A1</text:p>
          </table:table-cell>
          <table:table-cell table:style-name="SummaryTableDataCell">
            <text:p>Engine Out warning lamp</text:p>
          </table:table-cell>
        </table:table-row>
        <table:table-row>
          <table:table-cell table:style-name="SummaryTableDataCell">
            <text:p>A2</text:p>
          </table:table-cell>
          <table:table-cell table:style-name="SummaryTableDataCell">
            <text:p>Rotor RPM Low warning lamp</text:p>
          </table:table-cell>
        </table:table-row>
        <table:table-row>
          <table:table-cell table:style-name="SummaryTableDataCell">
            <text:p>A3</text:p>
          </table:table-cell>
          <table:table-cell table:style-name="SummaryTableDataCell">
            <text:p>Transmission Oil Pressure warning lamp</text:p>
          </table:table-cell>
        </table:table-row>
        <table:table-row>
          <table:table-cell table:style-name="SummaryTableDataCell">
            <text:p>A4</text:p>
          </table:table-cell>
          <table:table-cell table:style-name="SummaryTableDataCell">
            <text:p>Transmission Oil Temp warning lamp</text:p>
          </table:table-cell>
        </table:table-row>
        <table:table-row>
          <table:table-cell table:style-name="SummaryTableDataCell">
            <text:p>A5</text:p>
          </table:table-cell>
          <table:table-cell table:style-name="SummaryTableDataCell">
            <text:p>Battery Hot warning lamp</text:p>
          </table:table-cell>
        </table:table-row>
        <table:table-row>
          <table:table-cell table:style-name="SummaryTableDataCell">
            <text:p>A6</text:p>
          </table:table-cell>
          <table:table-cell table:style-name="SummaryTableDataCell">
            <text:p>Battery Temp warning lamp</text:p>
          </table:table-cell>
        </table:table-row>
        <table:table-row>
          <table:table-cell table:style-name="SummaryTableDataCell">
            <text:p>A7</text:p>
          </table:table-cell>
          <table:table-cell table:style-name="SummaryTableDataCell">
            <text:p>Engine Chip warning lamp</text:p>
          </table:table-cell>
        </table:table-row>
        <table:table-row>
          <table:table-cell table:style-name="SummaryTableDataCell">
            <text:p>A8</text:p>
          </table:table-cell>
          <table:table-cell table:style-name="SummaryTableDataCell">
            <text:p>Tail Rotor Chip warning lamp</text:p>
          </table:table-cell>
        </table:table-row>
        <table:table-row>
          <table:table-cell table:style-name="SummaryTableDataCell">
            <text:p>A9</text:p>
          </table:table-cell>
          <table:table-cell table:style-name="SummaryTableDataCell">
            <text:p>Transmission Chip warning lamp</text:p>
          </table:table-cell>
        </table:table-row>
        <table:table-row>
          <table:table-cell table:style-name="SummaryTableDataCell">
            <text:p>A10</text:p>
          </table:table-cell>
          <table:table-cell table:style-name="SummaryTableDataCell">
            <text:p>Baggage Door warning lamp</text:p>
          </table:table-cell>
        </table:table-row>
        <table:table-row>
          <table:table-cell table:style-name="SummaryTableDataCell">
            <text:p>A11</text:p>
          </table:table-cell>
          <table:table-cell table:style-name="SummaryTableDataCell">
            <text:p>Aft Fuel Filter warning lamp</text:p>
          </table:table-cell>
        </table:table-row>
        <table:table-row>
          <table:table-cell table:style-name="SummaryTableDataCell">
            <text:p>A12</text:p>
          </table:table-cell>
          <table:table-cell table:style-name="SummaryTableDataCell">
            <text:p>Fuel Pump warning lamp</text:p>
          </table:table-cell>
        </table:table-row>
        <table:table-row>
          <table:table-cell table:style-name="SummaryTableDataCell">
            <text:p>A13</text:p>
          </table:table-cell>
          <table:table-cell table:style-name="SummaryTableDataCell">
            <text:p>Generator Fail warning lamp</text:p>
          </table:table-cell>
        </table:table-row>
        <table:table-row>
          <table:table-cell table:style-name="SummaryTableDataCell">
            <text:p>A14</text:p>
          </table:table-cell>
          <table:table-cell table:style-name="SummaryTableDataCell">
            <text:p>Low Fuel warning lamp</text:p>
          </table:table-cell>
        </table:table-row>
        <table:table-row>
          <table:table-cell table:style-name="SummaryTableDataCell">
            <text:p>A15</text:p>
          </table:table-cell>
          <table:table-cell table:style-name="SummaryTableDataCell">
            <text:p>Standby Compass (SC) Fail warning lamp</text:p>
          </table:table-cell>
        </table:table-row>
      </table:table>
      <text:h text:outline-level="3" text:style-name="H2Style">Local network configuration</text:h>
      <table:table table:name="Table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2</text:span></text:p>
          </table:table-cell>
        </table:table-row>
        <table:table-row>
          <table:table-cell table:style-name="SummaryTableDataCell">
            <text:p>MAC</text:p>
          </table:table-cell>
          <table:table-cell table:style-name="SummaryTableDataCell">
            <text:p><text:span text:style-name="CodeChar">A8:61:0A:9E:83:02</text:span></text:p>
          </table:table-cell>
        </table:table-row>
        <table:table-row>
          <table:table-cell table:style-name="SummaryTableDataCell">
            <text:p>Local port <text:span text:style-name="CodeChar">localport</text:span></text:p>
          </table:table-cell>
          <table:table-cell table:style-name="SummaryTableDataCell">
            <text:p>7788 (bound, source socket for outbound debug packets)</text:p>
          </table:table-cell>
        </table:table-row>
        <table:table-row>
          <table:table-cell table:style-name="SummaryTableDataCell">
            <text:p>Local port <text:span text:style-name="CodeChar">localdebugport</text:span></text:p>
          </table:table-cell>
          <table:table-cell table:style-name="SummaryTableDataCell">
            <text:p>7795 (bound, currently unused for send/receive)</text:p>
          </table:table-cell>
        </table:table-row>
        <table:table-row>
          <table:table-cell table:style-name="SummaryTableDataCell">
            <text:p>Local port <text:span text:style-name="CodeChar">MSFSport</text:span></text:p>
          </table:table-cell>
          <table:table-cell table:style-name="SummaryTableDataCell">
            <text:p>13136 (listens for sim data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he <text:span text:style-name="CodeChar">byte mac[]</text:span> array in this sketch previously read <text:span text:style-name="CodeChar">{0xA8,0x61,0x0A,0x9E,0x83,0x01}</text:span> — byte-for-byte identical to <text:span text:style-name="CodeChar">JET_RANGER_RADIO_CONTROLLER</text:span>'s MAC, even though the human-readable <text:span text:style-name="CodeChar">sMac</text:span> string already said <text:span text:style-name="CodeChar">...:02</text:span>. The byte array now matches the label, so all three network boards (Radio, Servo, Upper) have unique MACs.</text:p>
      <text:h text:outline-level="3" text:style-name="H2Style">Remote endpoints this sketch talks to</text:h>
      <table:table table:name="Table8"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SERVO"</text:span></text:p>
          </table:table-cell>
        </table:table-row>
      </table:table>
      <text:h text:outline-level="3" text:style-name="H2Style">C# programs this sketch communicates with</text:h>
      <text:list>
        <text:list-item>
          <text:p text:style-name="ListParaStyle"><text:span text:style-name="BoldChar">P3D_to_UDP</text:span> / <text:span text:style-name="BoldChar">SimConnect_to_UDP</text:span> / <text:span text:style-name="BoldChar">MSFSSimConnectExtractor (WindowsFormsApp2)</text:span> — the SimConnect↔UDP bridge apps. Each one connects a UDP client to <text:span text:style-name="CodeChar">172.16.1.102:13136</text:span> (this board) and streams the <text:span text:style-name="CodeChar">D,TQ:...,IAS:...</text:span> front-panel data packets this sketch parses.</text:p>
        </text:list-item>
        <text:list-item>
          <text:p text:style-name="ListParaStyle"><text:span text:style-name="BoldChar">ServoTuner</text:span> — a standalone WinForms calibration tool that connects directly to <text:span text:style-name="CodeChar">172.16.1.102:13136</text:span> and lets an operator push manual or formula-converted <text:span text:style-name="CodeChar">D,&lt;CODE&gt;:&lt;value&gt;</text:span> packets to this board to find/verify each servo's min/max/zero pulse positions, independent of the flight sim.</text:p>
        </text:list-item>
        <text:list-item>
          <text:p text:style-name="ListParaStyle"><text:span text:style-name="BoldChar">JetRangerHealthMonitor</text:span> — listens on UDP <text:span text:style-name="BoldChar">13137</text:span> and lights the "Servo" indicator green on receipt of this sketch's keepalive.</text:p>
        </text:list-item>
        <text:list-item>
          <text:p text:style-name="ListParaStyle">No C# project in this repository listens on <text:span text:style-name="CodeChar">172.16.1.10:27000</text:span> (the debug log stream has no in-repo consumer).</text:p>
        </text:list-item>
      </text:list>
      <text:h text:outline-level="2" text:style-name="H1Style">JET_RANGER_UPPER_CONTROLLER — Program Summary</text:h>
      <text:p text:style-name="BodyStyle">Arduino Mega 2560 + W5500 Ethernet shield. Scans the large overhead/upper panel switch matrix (up to 256 inputs, 176 used) plus a small numeric keypad, and fans the results out two ways: to DCS-BIOS (serial, for DCS World) and, over UDP, to a separate USB-HID board (<text:span text:style-name="CodeChar">UDP_TO_HID</text:span>) that presents the buttons to Windows/MSFS as joystick buttons and keystrokes.</text:p>
      <text:h text:outline-level="3" text:style-name="H2Style">Program flow</text:h>
      <text:p text:style-name="BodyStyle">1. <text:span text:style-name="BoldChar">Setup</text:span></text:p>
      <text:list>
        <text:list-item>
          <text:p text:style-name="ListParaStyle">Sets status LED pins, resets the W5500 shield, brings up Ethernet on the static IP, opens the UDP sockets below, flashes the red LED for 3s while the link settles.</text:p>
        </text:list-item>
        <text:list-item>
          <text:p text:style-name="ListParaStyle">Configures digital pins 22–37 as outputs (matrix row drivers) and 38–49 as inputs with pull-ups (matrix column readers).</text:p>
        </text:list-item>
        <text:list-item>
          <text:p text:style-name="ListParaStyle">Clears the button-state and debounce arrays, initialises the keypad.</text:p>
        </text:list-item>
      </text:list>
      <text:p text:style-name="BodyStyle">2. <text:span text:style-name="BoldChar">Main loop</text:span> (<text:span text:style-name="CodeChar">loop()</text:span>)</text:p>
      <text:list>
        <text:list-item>
          <text:p text:style-name="ListParaStyle">Toggles the status LEDs every 200ms (heartbeat).</text:p>
        </text:list-item>
        <text:list-item>
          <text:p text:style-name="ListParaStyle">Sends a <text:span text:style-name="CodeChar">"UPPER_INPUT"</text:span> keepalive to the reflector every 10s.</text:p>
        </text:list-item>
        <text:list-item>
          <text:p text:style-name="ListParaStyle"><text:span text:style-name="CodeChar">ScanInputs()</text:span>: drives each of the 16 rows low in turn (direct <text:span text:style-name="CodeChar">PORTA</text:span>/<text:span text:style-name="CodeChar">PORTC</text:span> register writes) and reads the corresponding column inputs (direct <text:span text:style-name="CodeChar">PIND</text:span>/<text:span text:style-name="CodeChar">PING</text:span>/<text:span text:style-name="CodeChar">PINL</text:span> register reads) to build a 176-button state array, then calls <text:span text:style-name="CodeChar">FindInputChanges()</text:span>.</text:p>
        </text:list-item>
        <text:list-item>
          <text:p text:style-name="ListParaStyle"><text:span text:style-name="CodeChar">FindInputChanges()</text:span>: for each button whose state changed (and is past its debounce window), calls <text:span text:style-name="CodeChar">CreateDcsBiosMessage(index, state)</text:span> (a per-button DCS-BIOS switch mapping — currently a stub with no bodies filled in) and <text:span text:style-name="CodeChar">SendButtonToHid(index, state)</text:span>, which forwards the press/release over UDP to the <text:span text:style-name="CodeChar">UDP_TO_HID</text:span> board.</text:p>
        </text:list-item>
        <text:list-item>
          <text:p text:style-name="ListParaStyle"><text:span text:style-name="CodeChar">scanMatrix()</text:span>: separately scans the small 4x3 numeric keypad; on a key press it calls <text:span text:style-name="CodeChar">SendKeyToHid(key, 1)</text:span> then, after the key is released, <text:span text:style-name="CodeChar">SendKeyToHid(key, 0)</text:span> — forwarding to <text:span text:style-name="CodeChar">UDP_TO_HID</text:span> as a keyboard press/release.</text:p>
        </text:list-item>
      </text:list>
      <text:h text:outline-level="3" text:style-name="H2Style">Pin usage</text:h>
      <table:table table:name="Table9"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22–37</text:p>
          </table:table-cell>
          <table:table-cell table:style-name="SummaryTableDataCell">
            <text:p>16 button-matrix row drivers (direct <text:span text:style-name="CodeChar">PORTA</text:span>/<text:span text:style-name="CodeChar">PORTC</text:span> writes; up to 176 of 256 possible positions wired)</text:p>
          </table:table-cell>
        </table:table-row>
        <table:table-row>
          <table:table-cell table:style-name="SummaryTableDataCell">
            <text:p>38–49</text:p>
          </table:table-cell>
          <table:table-cell table:style-name="SummaryTableDataCell">
            <text:p>16 button-matrix column inputs (direct <text:span text:style-name="CodeChar">PIND</text:span>/<text:span text:style-name="CodeChar">PING</text:span>/<text:span text:style-name="CodeChar">PINL</text:span> reads); pins 50–53 reserved for the Ethernet SPI bus so the last 4 "columns" are hard-wired to <text:span text:style-name="CodeChar">1</text:span> (unused)</text:p>
          </table:table-cell>
        </table:table-row>
        <table:table-row>
          <table:table-cell table:style-name="SummaryTableDataCell">
            <text:p>A10, A12, A14, A15</text:p>
          </table:table-cell>
          <table:table-cell table:style-name="SummaryTableDataCell">
            <text:p>4x3 numeric keypad rows</text:p>
          </table:table-cell>
        </table:table-row>
        <table:table-row>
          <table:table-cell table:style-name="SummaryTableDataCell">
            <text:p>A9, A11, A13</text:p>
          </table:table-cell>
          <table:table-cell table:style-name="SummaryTableDataCell">
            <text:p>4x3 numeric keypad columns</text:p>
          </table:table-cell>
        </table:table-row>
        <table:table-row>
          <table:table-cell table:style-name="SummaryTableDataCell">
            <text:p>Serial (USB)</text:p>
          </table:table-cell>
          <table:table-cell table:style-name="SummaryTableDataCell">
            <text:p>DCS-BIOS <text:span text:style-name="CodeChar">DCSBIOS_IRQ_SERIAL</text:span> link to the DCS World PC (separate from the Ethernet/UDP path below)</text:p>
          </table:table-cell>
        </table:table-row>
      </table:table>
      <text:h text:outline-level="3" text:style-name="H2Style">Local network configuration</text:h>
      <table:table table:name="Table10"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3</text:span></text:p>
          </table:table-cell>
        </table:table-row>
        <table:table-row>
          <table:table-cell table:style-name="SummaryTableDataCell">
            <text:p>MAC</text:p>
          </table:table-cell>
          <table:table-cell table:style-name="SummaryTableDataCell">
            <text:p><text:span text:style-name="CodeChar">A8:61:0A:9E:83:03</text:span></text:p>
          </table:table-cell>
        </table:table-row>
        <table:table-row>
          <table:table-cell table:style-name="SummaryTableDataCell">
            <text:p>Local port <text:span text:style-name="CodeChar">localport</text:span></text:p>
          </table:table-cell>
          <table:table-cell table:style-name="SummaryTableDataCell">
            <text:p>7788 (bound, source socket for outbound debug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his sketch previously hard-coded the same IP (<text:span text:style-name="CodeChar">172.16.1.101</text:span>) and MAC as <text:span text:style-name="CodeChar">JET_RANGER_RADIO_CONTROLLER</text:span>. It has been renumbered to <text:span text:style-name="CodeChar">172.16.1.103</text:span> / MAC <text:span text:style-name="CodeChar">...83:03</text:span>, which is safe because this board never listens for MSFS data on the <text:span text:style-name="CodeChar">MSFSport</text:span> (unlike Radio/Servo) — nothing on the C# side targets its IP directly, so no other project needed updating.</text:p>
      <text:h text:outline-level="3" text:style-name="H2Style">Remote endpoints this sketch talks to</text:h>
      <table:table table:name="Table11"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UPPER_INPUT"</text:span></text:p>
          </table:table-cell>
        </table:table-row>
        <table:table-row>
          <table:table-cell table:style-name="SummaryTableDataCell">
            <text:p><text:span text:style-name="CodeChar">172.16.1.11</text:span> (<text:span text:style-name="CodeChar">UDP_TO_HID</text:span> board, <text:span text:style-name="CodeChar">hidIP</text:span>)</text:p>
          </table:table-cell>
          <table:table-cell table:style-name="SummaryTableDataCell">
            <text:p>4210 (<text:span text:style-name="CodeChar">hidPort</text:span>)</text:p>
          </table:table-cell>
          <table:table-cell table:style-name="SummaryTableDataCell">
            <text:p>Button events (<text:span text:style-name="CodeChar">"&lt;idx&gt;,&lt;state&gt;"</text:span>) and key events (<text:span text:style-name="CodeChar">"KEY,&lt;key&gt;,&lt;state&gt;"</text:span>)</text:p>
          </table:table-cell>
        </table:table-row>
      </table:table>
      <text:h text:outline-level="3" text:style-name="H2Style">C# programs this sketch communicates with</text:h>
      <text:list>
        <text:list-item>
          <text:p text:style-name="ListParaStyle">None directly over IP for the main data path — this board's Ethernet traffic is only debug logging and health-monitor keepalives, both to <text:span text:style-name="CodeChar">172.16.1.10</text:span>.</text:p>
        </text:list-item>
        <text:list-item>
          <text:p text:style-name="ListParaStyle"><text:span text:style-name="BoldChar">JetRangerHealthMonitor</text:span> — listens on UDP <text:span text:style-name="BoldChar">13137</text:span> and lights the "Upper Input" indicator green on receipt of this sketch's keepalive.</text:p>
        </text:list-item>
        <text:list-item>
          <text:p text:style-name="ListParaStyle">No C# project in this repository listens on <text:span text:style-name="CodeChar">172.16.1.10:27000</text:span> (the debug log stream has no in-repo consumer).</text:p>
        </text:list-item>
        <text:list-item>
          <text:p text:style-name="ListParaStyle">The DCS-BIOS serial link is consumed by whatever DCS-BIOS export/hub software runs on the DCS World PC — that bridge isn't a C# project in this repository.</text:p>
        </text:list-item>
        <text:list-item>
          <text:p text:style-name="ListParaStyle">Its actual button/keyboard output is consumed by the <text:span text:style-name="BoldChar">UDP_TO_HID</text:span> Arduino sketch (not a C# program), at <text:span text:style-name="CodeChar">172.16.1.11:4210</text:span>.</text:p>
        </text:list-item>
      </text:list>
      <text:h text:outline-level="2" text:style-name="H1Style">UDP_TO_HID — Program Summary</text:h>
      <text:p text:style-name="BodyStyle">Arduino board with native USB HID support (e.g. Leonardo/Micro-class, using <text:span text:style-name="CodeChar">Joystick.h</text:span>/<text:span text:style-name="CodeChar">Keyboard.h</text:span>) + W5500 Ethernet shield. Acts as a network-to-USB bridge: it receives button/key commands over UDP from <text:span text:style-name="CodeChar">JET_RANGER_UPPER_CONTROLLER</text:span> and re-emits them to Windows as four virtual 32-button joysticks (128 buttons total) plus standard keyboard key presses, so DCS-BIOS/MSFS/DCS World see ordinary USB game controllers and a keyboard.</text:p>
      <text:h text:outline-level="3" text:style-name="H2Style">Program flow</text:h>
      <text:p text:style-name="BodyStyle">1. <text:span text:style-name="BoldChar">Setup</text:span></text:p>
      <text:list>
        <text:list-item>
          <text:p text:style-name="ListParaStyle">Starts all 4 virtual joysticks and the virtual keyboard (<text:span text:style-name="CodeChar">Joystick.begin()</text:span> x4, <text:span text:style-name="CodeChar">Keyboard.begin()</text:span>).</text:p>
        </text:list-item>
        <text:list-item>
          <text:p text:style-name="ListParaStyle">Brings up Ethernet on the static IP, opens the command-listener, log, and keepalive UDP sockets, and logs a boot message.</text:p>
        </text:list-item>
      </text:list>
      <text:p text:style-name="BodyStyle">2. <text:span text:style-name="BoldChar">Main loop</text:span> (<text:span text:style-name="CodeChar">loop()</text:span>)</text:p>
      <text:list>
        <text:list-item>
          <text:p text:style-name="ListParaStyle">Sends a <text:span text:style-name="CodeChar">"JOYSTICK"</text:span> keepalive every 10s.</text:p>
        </text:list-item>
        <text:list-item>
          <text:p text:style-name="ListParaStyle">Reads the single local physical button (pin 5) and reflects its state onto virtual Joystick 1, button 0.</text:p>
        </text:list-item>
        <text:list-item>
          <text:p text:style-name="ListParaStyle">Checks for an incoming UDP command packet; if present, logs the sender and payload, then calls <text:span text:style-name="CodeChar">processCommand()</text:span>.</text:p>
        </text:list-item>
        <text:list-item>
          <text:p text:style-name="ListParaStyle"><text:span text:style-name="CodeChar">processCommand()</text:span> recognises two payload formats:</text:p>
        </text:list-item>
        <text:list-item>
          <text:p text:style-name="ListParaStyle"><text:span text:style-name="CodeChar">"&lt;idx&gt;,&lt;state&gt;"</text:span> — sets button <text:span text:style-name="CodeChar">idx % 32</text:span> on virtual joystick <text:span text:style-name="CodeChar">idx / 32</text:span> (0–31 → Joystick 1, 32–63 → Joystick 2, 64–95 → Joystick 3, 96–127 → Joystick 4) to pressed/released.</text:p>
        </text:list-item>
        <text:list-item>
          <text:p text:style-name="ListParaStyle"><text:span text:style-name="CodeChar">"KEY,&lt;key&gt;,&lt;state&gt;"</text:span> — presses/releases a keyboard key. A single character is sent as its ASCII value; longer names (e.g. <text:span text:style-name="CodeChar">ENTER</text:span>, <text:span text:style-name="CodeChar">F5</text:span>, <text:span text:style-name="CodeChar">LCTRL</text:span>) are mapped to <text:span text:style-name="CodeChar">Keyboard.h</text:span> key codes via <text:span text:style-name="CodeChar">resolveKeyCode()</text:span>.</text:p>
        </text:list-item>
      </text:list>
      <text:h text:outline-level="3" text:style-name="H2Style">Pin usage</text:h>
      <table:table table:name="Table12"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5</text:p>
          </table:table-cell>
          <table:table-cell table:style-name="SummaryTableDataCell">
            <text:p>Local physical pushbutton → Joystick 1, button 0</text:p>
          </table:table-cell>
        </table:table-row>
      </table:table>
      <text:p text:style-name="BodyStyle">(This board has no other physical panel wiring of its own — its purpose is purely to translate network commands into USB HID output.)</text:p>
      <text:h text:outline-level="3" text:style-name="H2Style">Local network configuration</text:h>
      <table:table table:name="Table13"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1</text:span></text:p>
          </table:table-cell>
        </table:table-row>
        <table:table-row>
          <table:table-cell table:style-name="SummaryTableDataCell">
            <text:p>MAC</text:p>
          </table:table-cell>
          <table:table-cell table:style-name="SummaryTableDataCell">
            <text:p><text:span text:style-name="CodeChar">DE:AD:BE:EF:FE:ED</text:span></text:p>
          </table:table-cell>
        </table:table-row>
        <table:table-row>
          <table:table-cell table:style-name="SummaryTableDataCell">
            <text:p>Local port <text:span text:style-name="CodeChar">localPort</text:span></text:p>
          </table:table-cell>
          <table:table-cell table:style-name="SummaryTableDataCell">
            <text:p>4210 (listens for button/key commands)</text:p>
          </table:table-cell>
        </table:table-row>
      </table:table>
      <text:h text:outline-level="3" text:style-name="H2Style">Remote endpoints this sketch talks to</text:h>
      <table:table table:name="Table14"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text:span text:style-name="CodeChar">logHost</text:span>)</text:p>
          </table:table-cell>
          <table:table-cell table:style-name="SummaryTableDataCell">
            <text:p>27000 (<text:span text:style-name="CodeChar">logPort</text:span>)</text:p>
          </table:table-cell>
          <table:table-cell table:style-name="SummaryTableDataCell">
            <text:p>Log messages (boot, button/key events, malformed-command warnings)</text:p>
          </table:table-cell>
        </table:table-row>
        <table:table-row>
          <table:table-cell table:style-name="SummaryTableDataCell">
            <text:p><text:span text:style-name="CodeChar">172.16.1.10</text:span> (<text:span text:style-name="CodeChar">logHost</text:span>)</text:p>
          </table:table-cell>
          <table:table-cell table:style-name="SummaryTableDataCell">
            <text:p>13137 (<text:span text:style-name="CodeChar">aliveport</text:span>)</text:p>
          </table:table-cell>
          <table:table-cell table:style-name="SummaryTableDataCell">
            <text:p>10s keepalive <text:span text:style-name="CodeChar">"JOYSTICK"</text:span></text:p>
          </table:table-cell>
        </table:table-row>
      </table:table>
      <text:h text:outline-level="3" text:style-name="H2Style">C# programs this sketch communicates with</text:h>
      <text:list>
        <text:list-item>
          <text:p text:style-name="ListParaStyle">None directly — its only IP peer in the current fleet is <text:span text:style-name="CodeChar">JET_RANGER_UPPER_CONTROLLER</text:span> (an Arduino, not a C# program), which sends it button/key commands on port 4210.</text:p>
        </text:list-item>
        <text:list-item>
          <text:p text:style-name="ListParaStyle"><text:span text:style-name="BoldChar">JetRangerHealthMonitor</text:span> — listens on UDP <text:span text:style-name="BoldChar">13137</text:span> and lights the "JoyStick" indicator green on receipt of this sketch's keepalive.</text:p>
        </text:list-item>
        <text:list-item>
          <text:p text:style-name="ListParaStyle">No C# project in this repository listens on <text:span text:style-name="CodeChar">172.16.1.10:27000</text:span> (the log stream has no in-repo consumer).</text:p>
        </text:list-item>
        <text:list-item>
          <text:p text:style-name="ListParaStyle">Once this board presents its virtual joysticks/keyboard to Windows, any DCS-BIOS/DCS World or MSFS control-binding software on that PC can pick up the button presses like any other USB game controller — that's an OS HID interaction, not an IP one.</text:p>
        </text:list-item>
      </text:list>
      <text:h text:outline-level="2" text:style-name="H1Style">Servo-Knob-For-Calibration — Program Summary</text:h>
      <text:p text:style-name="BodyStyle">Small standalone bench-test sketch (based on the classic Arduino "Knob" example) used to manually drive a single servo with a potentiometer while working out the min/max pulse values for a gauge — it is not part of the networked Jet Ranger panel fleet and has no Ethernet code at all.</text:p>
      <text:h text:outline-level="3" text:style-name="H2Style">Program flow</text:h>
      <text:p text:style-name="BodyStyle">1. <text:span text:style-name="BoldChar">Setup</text:span>: starts Serial at 9600 baud and attaches one <text:span text:style-name="CodeChar">Servo</text:span> object to pin 9. 2. <text:span text:style-name="BoldChar">Main loop</text:span> (<text:span text:style-name="CodeChar">loop()</text:span>): reads the potentiometer on <text:span text:style-name="CodeChar">A0</text:span>, maps its 0–1023 range to a 0–180° servo angle (inverted: 1023→0°, 0→180°), writes it to the servo, and prints the raw pot value to Serial whenever it changes. 3. A large block of unused helper functions (<text:span text:style-name="CodeChar">EngineTorque()</text:span>, <text:span text:style-name="CodeChar">TransmissionPressure()</text:span>, <text:span text:style-name="CodeChar">EGT()</text:span>, <text:span text:style-name="CodeChar">Airspeed()</text:span>, <text:span text:style-name="CodeChar">VSI()</text:span>, etc.) is defined below <text:span text:style-name="CodeChar">loop()</text:span>. These reproduce the min/max servo-position mapping tables also found in <text:span text:style-name="CodeChar">JET_RANGER_SERVO_CONTROLLER</text:span>, <text:span text:style-name="CodeChar">ServoTuner</text:span>, and the various SimConnect-to-UDP bridge apps, but are never called from anywhere in this sketch — they exist purely as reference/scratch code for deriving those calibration constants by hand.</text:p>
      <text:h text:outline-level="3" text:style-name="H2Style">Pin usage</text:h>
      <table:table table:name="Table15"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A0</text:p>
          </table:table-cell>
          <table:table-cell table:style-name="SummaryTableDataCell">
            <text:p>Potentiometer input (<text:span text:style-name="CodeChar">potpin</text:span>) driving the servo position</text:p>
          </table:table-cell>
        </table:table-row>
        <table:table-row>
          <table:table-cell table:style-name="SummaryTableDataCell">
            <text:p>9</text:p>
          </table:table-cell>
          <table:table-cell table:style-name="SummaryTableDataCell">
            <text:p>Servo signal output (<text:span text:style-name="CodeChar">myservo</text:span>)</text:p>
          </table:table-cell>
        </table:table-row>
      </table:table>
      <text:h text:outline-level="3" text:style-name="H2Style">Local network configuration / IP addresses</text:h>
      <text:p text:style-name="BodyStyle">None — this sketch does not include the Ethernet/SPI libraries and performs no network communication of any kind.</text:p>
      <text:h text:outline-level="3" text:style-name="H2Style">C# programs this sketch communicates with</text:h>
      <text:p text:style-name="BodyStyle">None. It's a serial-only bench-calibration tool; it doesn't talk to any of the Jet Ranger C# WinForms applications. Its unused helper functions encode the same value ranges as <text:span text:style-name="BoldChar">ServoTuner</text:span> and the SimConnect-to-UDP bridge apps (<text:span text:style-name="CodeChar">P3D_to_UDP</text:span> / <text:span text:style-name="CodeChar">SimConnect_to_UDP</text:span> / <text:span text:style-name="CodeChar">MSFSSimConnectExtractor</text:span>), which is presumably where those constants were later ported to.</text:p>
      <text:h text:outline-level="2" text:style-name="H1Style">DataReceiver — Program Summary</text:h>
      <text:p text:style-name="BodyStyle">Standalone prototype sketch (the sketch file itself is named <text:span text:style-name="CodeChar">DataReceiver</text:span> with no <text:span text:style-name="CodeChar">.ino</text:span> extension, inside this folder) that receives JSON flight data over UDP and drives a single servo from one instrument value. It uses a different IP scheme (<text:span text:style-name="CodeChar">192.168.1.x</text:span>, DHCP-router style) to the rest of the Jet Ranger fleet (<text:span text:style-name="CodeChar">172.16.1.x</text:span>) and talks a different wire format (JSON rather than the <text:span text:style-name="CodeChar">D,CODE:value</text:span> CSV used elsewhere) — this is an experimental/demo sketch, not part of the production panel network.</text:p>
      <text:h text:outline-level="3" text:style-name="H2Style">Program flow</text:h>
      <text:p text:style-name="BodyStyle">1. <text:span text:style-name="BoldChar">Setup</text:span></text:p>
      <text:list>
        <text:list-item>
          <text:p text:style-name="ListParaStyle">Starts Serial at 115200 baud.</text:p>
        </text:list-item>
        <text:list-item>
          <text:p text:style-name="ListParaStyle">Brings up Ethernet with a static IP (DHCP code path is present but commented out).</text:p>
        </text:list-item>
        <text:list-item>
          <text:p text:style-name="ListParaStyle">Opens the UDP listener on the local port below and attaches one servo, centring it at 90°.</text:p>
        </text:list-item>
      </text:list>
      <text:p text:style-name="BodyStyle">2. <text:span text:style-name="BoldChar">Main loop</text:span> (<text:span text:style-name="CodeChar">loop()</text:span>)</text:p>
      <text:list>
        <text:list-item>
          <text:p text:style-name="ListParaStyle">Checks for an incoming UDP packet; if present, null-terminates it and logs the sender IP/port and raw contents to Serial.</text:p>
        </text:list-item>
        <text:list-item>
          <text:p text:style-name="ListParaStyle">Parses the packet as JSON (<text:span text:style-name="CodeChar">ArduinoJson</text:span>, 256-byte fixed document).</text:p>
        </text:list-item>
        <text:list-item>
          <text:p text:style-name="ListParaStyle">Looks up the <text:span text:style-name="CodeChar">"Airspeed Indicator"</text:span> key: if it's a float, maps it from the configured instrument range (0–250 knots) to the servo's 0–180° range (clamped) and writes it to the servo; if it's the string <text:span text:style-name="CodeChar">"N/A"</text:span>, skips the update; otherwise logs a warning.</text:p>
        </text:list-item>
        <text:list-item>
          <text:p text:style-name="ListParaStyle">All other keys in the JSON payload are currently ignored (only one instrument is wired to a servo in this prototype).</text:p>
        </text:list-item>
      </text:list>
      <text:h text:outline-level="3" text:style-name="H2Style">Pin usage</text:h>
      <table:table table:name="Table16"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8</text:p>
          </table:table-cell>
          <table:table-cell table:style-name="SummaryTableDataCell">
            <text:p>Servo signal output (<text:span text:style-name="CodeChar">myServo</text:span>), mapped from the "Airspeed Indicator" JSON value</text:p>
          </table:table-cell>
        </table:table-row>
      </table:table>
      <text:h text:outline-level="3" text:style-name="H2Style">Local network configuration</text:h>
      <table:table table:name="Table1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92.168.1.177</text:span></text:p>
          </table:table-cell>
        </table:table-row>
        <table:table-row>
          <table:table-cell table:style-name="SummaryTableDataCell">
            <text:p>Gateway</text:p>
          </table:table-cell>
          <table:table-cell table:style-name="SummaryTableDataCell">
            <text:p><text:span text:style-name="CodeChar">192.168.1.1</text:span></text:p>
          </table:table-cell>
        </table:table-row>
        <table:table-row>
          <table:table-cell table:style-name="SummaryTableDataCell">
            <text:p>Subnet</text:p>
          </table:table-cell>
          <table:table-cell table:style-name="SummaryTableDataCell">
            <text:p><text:span text:style-name="CodeChar">255.255.255.0</text:span></text:p>
          </table:table-cell>
        </table:table-row>
        <table:table-row>
          <table:table-cell table:style-name="SummaryTableDataCell">
            <text:p>MAC</text:p>
          </table:table-cell>
          <table:table-cell table:style-name="SummaryTableDataCell">
            <text:p><text:span text:style-name="CodeChar">DE:AD:BE:EF:FE:ED</text:span> (same placeholder MAC as <text:span text:style-name="CodeChar">UDP_TO_HID</text:span> — fine so long as the two are never on the same LAN segment, since they're on different subnets/projects)</text:p>
          </table:table-cell>
        </table:table-row>
        <table:table-row>
          <table:table-cell table:style-name="SummaryTableDataCell">
            <text:p>Local port <text:span text:style-name="CodeChar">localUdpPort</text:span></text:p>
          </table:table-cell>
          <table:table-cell table:style-name="SummaryTableDataCell">
            <text:p>5005 (listens for JSON instrument packets)</text:p>
          </table:table-cell>
        </table:table-row>
      </table:table>
      <text:h text:outline-level="3" text:style-name="H2Style">Remote endpoints this sketch talks to</text:h>
      <text:p text:style-name="BodyStyle">None outbound — it only listens on UDP 5005 and replies via Serial print, it does not send any UDP packets back to the sender.</text:p>
      <text:h text:outline-level="3" text:style-name="H2Style">C# programs this sketch communicates with</text:h>
      <text:p text:style-name="BodyStyle">No C# program — its sender is a <text:span text:style-name="BoldChar">Python</text:span> script, not a C# app:</text:p>
      <text:list>
        <text:list-item>
          <text:p text:style-name="ListParaStyle"><text:span text:style-name="BoldChar">Export_From_SimConnect.py</text:span> (<text:span text:style-name="CodeChar">Jet Ranger Python Code</text:span>) connects to SimConnect, polls a set of instrument SimVars (airspeed, attitude, altimeter, N1/N2, rotor RPM, engine torque/oil/temp, transmission oil/temp, fuel level/pressure, electrical load, etc.) every 100ms, and sends them as a single JSON object over UDP to <text:span text:style-name="CodeChar">127.0.0.1:5005</text:span> by default (<text:span text:style-name="CodeChar">UDP_IP</text:span>/<text:span text:style-name="CodeChar">UDP_PORT</text:span>) — i.e. it's normally run on the same PC as a listener rather than targeting this Arduino's <text:span text:style-name="CodeChar">192.168.1.177</text:span> address directly; the target IP would need to be changed to point at the board.</text:p>
        </text:list-item>
        <text:list-item>
          <text:p text:style-name="ListParaStyle"><text:span text:style-name="BoldChar">Test_Receiver.py</text:span> (<text:span text:style-name="CodeChar">Jet Ranger Python Code</text:span>) is a PC-side stand-in for this sketch: it binds UDP port 5005 on <text:span text:style-name="CodeChar">0.0.0.0</text:span> and prints/decodes the same JSON payloads, useful for verifying <text:span text:style-name="CodeChar">Export_From_SimConnect.py</text:span>'s output without the Arduino hardware attached.</text:p>
        </text:list-item>
      </text:list>
      <text:h text:outline-level="1" text:style-name="TitleStyle">Part 2 — C# Programs</text:h>
      <text:p text:style-name="BodyStyle">Covers every project folder in " C# Code" except the retired/ directory.</text:p>
      <text:h text:outline-level="2" text:style-name="H1Style">Managed Data Request — Program Summary</text:h>
      <text:p text:style-name="BodyStyle">This is the <text:span text:style-name="BoldChar">unmodified Lockheed Martin Prepar3D SDK sample</text:span> ("Managed Data Request"), kept in the tree as the reference template the three real bridge apps (<text:span text:style-name="CodeChar">P3D_to_UDP</text:span>, <text:span text:style-name="CodeChar">SimConnect_to_UDP</text:span>, <text:span text:style-name="CodeChar">MSFSSimConnectExtractor</text:span>) were built from — all three still call <text:span text:style-name="CodeChar">new SimConnect("Managed Data Request", ...)</text:span> internally, which is a tell-tale sign of that shared ancestry.</text:p>
      <text:h text:outline-level="3" text:style-name="H2Style">Program flow</text:h>
      <text:p text:style-name="BodyStyle">1. <text:span text:style-name="BoldChar">Connect</text:span> button creates a <text:span text:style-name="CodeChar">SimConnect</text:span> client (title "Managed Data Request"), registers a single data definition (<text:span text:style-name="CodeChar">title</text:span>, latitude, longitude, altitude) and hooks <text:span text:style-name="CodeChar">OnRecvOpen</text:span>/<text:span text:style-name="CodeChar">OnRecvQuit</text:span>/<text:span text:style-name="CodeChar">OnRecvException</text:span>. 2. <text:span text:style-name="BoldChar">Request Data</text:span> button calls <text:span text:style-name="CodeChar">RequestDataOnSimObjectType</text:span> once per click (<text:span text:style-name="CodeChar">SIMCONNECT_SIMOBJECT_TYPE.USER</text:span>), which triggers a one-shot <text:span text:style-name="CodeChar">simconnect_OnRecvSimobjectDataBytype</text:span> callback that prints title/lat/lon/ alt to the on-screen log. 3. <text:span text:style-name="BoldChar">Disconnect</text:span> disposes the SimConnect client.</text:p>
      <text:p text:style-name="BodyStyle">There is no networking beyond the local SimConnect IPC channel to Prepar3D — no UDP sockets, no offsets, no servo/panel logic.</text:p>
      <text:h text:outline-level="3" text:style-name="H2Style">Local network configuration / IP addresses</text:h>
      <text:p text:style-name="BodyStyle">None. This sample only talks to a locally-running Prepar3D instance over SimConnect (Windows named-pipe/shared-memory IPC, not a UDP/TCP socket).</text:p>
      <text:h text:outline-level="3" text:style-name="H2Style">Programs this communicates with</text:h>
      <text:list>
        <text:list-item>
          <text:p text:style-name="ListParaStyle"><text:span text:style-name="BoldChar">Prepar3D</text:span> (must be running on the same PC) via SimConnect.</text:p>
        </text:list-item>
        <text:list-item>
          <text:p text:style-name="ListParaStyle">No Arduino boards, no other C# projects — this is a standalone reference/template, not part of the Jet Ranger panel network. It exists in the tree for comparison against <text:span text:style-name="CodeChar">P3D_to_UDP</text:span>, <text:span text:style-name="CodeChar">SimConnect_to_UDP</text:span> and <text:span text:style-name="CodeChar">MSFSSimConnectExtractor</text:span>, which all extended this same starting point with UDP output to the panel boards.</text:p>
        </text:list-item>
      </text:list>
      <text:h text:outline-level="2" text:style-name="H1Style">P3D_to_UDP — Program Summary</text:h>
      <text:p text:style-name="BodyStyle">WinForms bridge app that connects to a running <text:span text:style-name="BoldChar">Prepar3D</text:span> session via <text:span text:style-name="CodeChar">LockheedMartin.Prepar3D.SimConnect</text:span>, reads flight/engine/radio/electrical data, converts it into the servo-position and warning-lamp values the Arduino boards expect, and streams it out as UDP text packets. It also listens for control commands coming back from the Radio/Upper controller boards and turns them into SimConnect events (radio swap, battery, alternator, standby-frequency set). This is the Prepar3D-specific sibling of <text:span text:style-name="CodeChar">SimConnect_to_UDP</text:span> and <text:span text:style-name="CodeChar">MSFSSimConnectExtractor</text:span> — all three share near-identical code, differing mainly in which SimConnect SDK they link against and small per-sim data-availability quirks noted in code comments.</text:p>
      <text:h text:outline-level="3" text:style-name="H2Style">Program flow</text:h>
      <text:p text:style-name="BodyStyle">1. <text:span text:style-name="BoldChar">Startup</text:span> (<text:span text:style-name="CodeChar">frmMain()</text:span> constructor): connects the three outbound UDP clients (radio, front-panel, "output"), starts the inbound command listener, and initialises the internal servo-position array to each servo's zero position. 2. <text:span text:style-name="BoldChar">Connect</text:span> button (<text:span text:style-name="CodeChar">StartSimConnect</text:span>): opens a <text:span text:style-name="CodeChar">SimConnect("Managed Data Request", ...)</text:span> session; on failure, arms a 5s retry timer. <text:span text:style-name="CodeChar">initDataRequest()</text:span> registers three data definitions (<text:span text:style-name="CodeChar">Struct1</text:span> — a large "everything" struct, <text:span text:style-name="CodeChar">StructRadio</text:span> — just the radio/bus-voltage subset, <text:span text:style-name="CodeChar">StructFrontPanel</text:span> — the full instrument-panel subset) and requests <text:span text:style-name="CodeChar">StructFrontPanel</text:span> once per sim frame. 3. <text:span text:style-name="BoldChar">`simconnect_OnRecvSimobjectData`</text:span> (fires every sim frame):</text:p>
      <text:list>
        <text:list-item>
          <text:p text:style-name="ListParaStyle"><text:span text:style-name="CodeChar">DATA_REQUESTS.RADIOS</text:span> case: tracks COM1/2 active+standby, main bus voltage and NAVCOM1 power; if changed (or every 5s regardless), builds a <text:span text:style-name="CodeChar">"D,C1A:...,C1S:...,C2A:...,C2S:...,MAINBUS:...,NAVCOM1:..."</text:span> packet and sends it to the <text:span text:style-name="BoldChar">Radio Controller</text:span> board.</text:p>
        </text:list-item>
        <text:list-item>
          <text:p text:style-name="ListParaStyle"><text:span text:style-name="CodeChar">DATA_REQUESTS.REQUEST_FRONTPANEL</text:span> case: tracks ~15 instrument values, runs each through a <text:span text:style-name="CodeChar">*_Process()</text:span> mapping function (identical min/max/zero tables to <text:span text:style-name="CodeChar">JET_RANGER_SERVO_CONTROLLER</text:span>/<text:span text:style-name="CodeChar">ServoTuner</text:span>) to convert sim units into raw servo-position values, and builds a <text:span text:style-name="CodeChar">"D,ALT:...,IAS:...,RPMR:...,...,BATSW:..."</text:span> packet sent (throttled to every ≥200ms, or forced every ≥5s) to the <text:span text:style-name="BoldChar">Servo Controller</text:span> board.</text:p>
        </text:list-item>
      </text:list>
      <text:p text:style-name="BodyStyle">4. <text:span text:style-name="BoldChar">`StartListener`</text:span>: a background UDP listener on port 27001 receives control strings from the Radio/Upper controller boards and passes them to <text:span text:style-name="CodeChar">UpdateRadios()</text:span>, which maps known keywords (<text:span text:style-name="CodeChar">COM1_RADIO_SWAP</text:span>/<text:span text:style-name="CodeChar">COM2_RADIO_SWAP</text:span>/<text:span text:style-name="CodeChar">AVIONICS_MASTER_SET</text:span>/ <text:span text:style-name="CodeChar">MASTER_BATTERY_ON|OFF</text:span>/<text:span text:style-name="CodeChar">ALTERNATOR_ON|OFF</text:span>) to <text:span text:style-name="CodeChar">SendEvent()</text:span> calls, or — if the string parses as a plain float in the 118.00–136.975 range — sets COM1 standby frequency directly via <text:span text:style-name="CodeChar">KEY_COM_STBY_RADIO_SET_HZ</text:span>. 5. <text:span text:style-name="BoldChar">Disconnect</text:span> disposes the SimConnect session; <text:span text:style-name="BoldChar">Request Data</text:span> is a manual one-shot debug trigger.</text:p>
      <text:h text:outline-level="3" text:style-name="H2Style">FSUIPC / SimConnect data read</text:h>
      <text:p text:style-name="BodyStyle">Reads Prepar3D SimVars (altitude, airspeed, VSI, radar altitude, bank/pitch, rotor &amp; engine RPM, torque, ITT, oil pressure/temp, transmission pressure/temp, fuel qty, N1, electrical load/master battery/main bus voltage, COM/NAV frequencies, NAVCOM1 circuit state) — see <text:span text:style-name="CodeChar">initDataRequest()</text:span> for the full <text:span text:style-name="CodeChar">AddToDataDefinition</text:span> list.</text:p>
      <text:h text:outline-level="3" text:style-name="H2Style">Local network configuration</text:h>
      <table:table table:name="Table18"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19"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 (<text:span text:style-name="CodeChar">udpClient</text:span>)</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 (<text:span text:style-name="CodeChar">frontPanelClient</text:span>)</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currently unused; all <text:span text:style-name="CodeChar">Output_Payload</text:span> send code is commented out</text:p>
          </table:table-cell>
        </table:table-row>
      </table:table>
      <text:h text:outline-level="3" text:style-name="H2Style">Programs this communicates with</text:h>
      <text:list>
        <text:list-item>
          <text:p text:style-name="ListParaStyle"><text:span text:style-name="BoldChar">Prepar3D</text:span> (local SimConnect session) — data source and event sink.</text:p>
        </text:list-item>
        <text:list-item>
          <text:p text:style-name="ListParaStyle"><text:span text:style-name="BoldChar">[JET_RANGER_RADIO_CONTROLLER](../../Jet%20Ranger%20Arduino%20Sketches/JET_RANGER_RADIO_CONTROLLER/JET_RANGER_RADIO_CONTROLLER.ino)</text:span> (<text:span text:style-name="CodeChar">172.16.1.101:13136</text:span>) — receives radio/bus data; sends control commands back to this app's port 27001.</text:p>
        </text:list-item>
        <text:list-item>
          <text:p text:style-name="ListParaStyle"><text:span text:style-name="BoldChar">[JET_RANGER_SERVO_CONTROLLER](../../Jet%20Ranger%20Arduino%20Sketches/JET_RANGER_SERVO_CONTROLLER/JET_RANGER_SERVO_CONTROLLER.ino)</text:span> (<text:span text:style-name="CodeChar">172.16.1.102:13136</text:span>) — receives instrument/servo data.</text:p>
        </text:list-item>
        <text:list-item>
          <text:p text:style-name="ListParaStyle"><text:span text:style-name="BoldChar">[JET_RANGER_UPPER_CONTROLLER](../../Jet%20Ranger%20Arduino%20Sketches/JET_RANGER_UPPER_CONTROLLER/JET_RANGER_UPPER_CONTROLLER.ino)</text:span> — also a possible sender of control commands to port 27001, though it currently has no battery/alternator/radio-swap keys wired to send them.</text:p>
        </text:list-item>
        <text:list-item>
          <text:p text:style-name="ListParaStyle">Mutually exclusive alternatives, <text:span text:style-name="BoldChar">not</text:span> run at the same time as this app: <text:span text:style-name="BoldChar">SimConnect_to_UDP</text:span> (MSFS) and <text:span text:style-name="BoldChar">MSFSSimConnectExtractor</text:span> (MSFS) — whichever matches the flight sim actually in use is the one that should be running.</text:p>
        </text:list-item>
        <text:list-item>
          <text:p text:style-name="ListParaStyle"><text:span text:style-name="CodeChar">172.16.1.2:26028</text:span> has no consumer identified in this repository — the <text:span text:style-name="CodeChar">OutputClient</text:span> connection is established but never used to send data.</text:p>
        </text:list-item>
      </text:list>
      <text:h text:outline-level="2" text:style-name="H1Style">SimConnect_to_UDP — Program Summary</text:h>
      <text:p text:style-name="BodyStyle">WinForms bridge app, functionally identical to <text:span text:style-name="CodeChar">P3D_to_UDP</text:span> but built against <text:span text:style-name="CodeChar">Microsoft.FlightSimulator.SimConnect</text:span> for <text:span text:style-name="BoldChar">Microsoft Flight Simulator (2020/2024)</text:span> instead of Prepar3D. Reads flight/engine/radio/ electrical SimVars, converts them to servo-position/warning-lamp values, and streams them to the Radio and Servo Controller boards over UDP, while also listening for control commands coming back from the panel.</text:p>
      <text:h text:outline-level="3" text:style-name="H2Style">Program flow</text:h>
      <text:p text:style-name="BodyStyle">Identical structure to <text:span text:style-name="CodeChar">P3D_to_UDP</text:span> (see that project's summary for full detail):</text:p>
      <text:p text:style-name="BodyStyle">1. Constructor connects the outbound UDP clients, starts the port-27001 command listener, zeroes the internal servo-position array. 2. <text:span text:style-name="CodeChar">StartSimConnect()</text:span> opens a <text:span text:style-name="CodeChar">SimConnect("Managed Data Request", ...)</text:span> session against MSFS, with a 5s auto-retry on failure. 3. <text:span text:style-name="CodeChar">initDataRequest()</text:span> registers <text:span text:style-name="CodeChar">Struct1</text:span>/<text:span text:style-name="CodeChar">StructRadio</text:span>/<text:span text:style-name="CodeChar">StructFrontPanel</text:span> and requests <text:span text:style-name="CodeChar">StructFrontPanel</text:span> once per sim frame. 4. <text:span text:style-name="CodeChar">simconnect_OnRecvSimobjectData()</text:span> builds and sends the same <text:span text:style-name="CodeChar">"D,C1A:...,MAINBUS:...,NAVCOM1:..."</text:span> radio packet and <text:span text:style-name="CodeChar">"D,ALT:...,IAS:...,...,BATSW:..."</text:span> front-panel packet as <text:span text:style-name="CodeChar">P3D_to_UDP</text:span>, using the same per-instrument <text:span text:style-name="CodeChar">*_Process()</text:span> mapping tables. 5. <text:span text:style-name="CodeChar">UpdateRadios()</text:span> handles the same inbound command set (radio swap, avionics/battery/alternator, standby-frequency float) from the Radio/Upper controller boards.</text:p>
      <text:p text:style-name="BodyStyle">Code-level differences from <text:span text:style-name="CodeChar">P3D_to_UDP</text:span> worth noting: this version uses C# pattern-matching <text:span text:style-name="CodeChar">switch</text:span> cases (<text:span text:style-name="CodeChar">case &lt;= 20:</text:span>) instead of exact-value cases, and its header comments record MSFS-specific data quirks (FlyInside and CowaSim helicopter add-ons reporting transmission pressure/temp as 0, rotor RPM pegged at fixed percentages, ITT in Celsius, etc.) that the <text:span text:style-name="CodeChar">*_Process()</text:span> conversions have to work around.</text:p>
      <text:h text:outline-level="3" text:style-name="H2Style">SimConnect data read</text:h>
      <text:p text:style-name="BodyStyle">Same SimVar set as <text:span text:style-name="CodeChar">P3D_to_UDP</text:span> (altitude, airspeed, VSI, radar altitude, bank/pitch, rotor &amp; engine RPM, torque, ITT, oil pressure/temp, transmission pressure/temp, fuel qty, N1, electrical load/master battery/main bus voltage, COM/NAV frequencies, NAVCOM1 circuit state).</text:p>
      <text:h text:outline-level="3" text:style-name="H2Style">Local network configuration</text:h>
      <table:table table:name="Table20"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21"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 (no send code active)</text:p>
          </table:table-cell>
        </table:table-row>
      </table:table>
      <text:h text:outline-level="3" text:style-name="H2Style">Programs this communicates with</text:h>
      <text:list>
        <text:list-item>
          <text:p text:style-name="ListParaStyle"><text:span text:style-name="BoldChar">Microsoft Flight Simulator</text:span> (local SimConnect session) — data source and event sink.</text:p>
        </text:list-item>
        <text:list-item>
          <text:p text:style-name="ListParaStyle"><text:span text:style-name="BoldChar">[JET_RANGER_RADIO_CONTROLLER](../../Jet%20Ranger%20Arduino%20Sketches/JET_RANGER_RADIO_CONTROLLER/JET_RANGER_RADIO_CONTROLLER.ino)</text:span> (<text:span text:style-name="CodeChar">172.16.1.101:13136</text:span>) and</text:p>
        </text:list-item>
      </text:list>
      <text:p text:style-name="BodyStyle"><text:span text:style-name="BoldChar">[JET_RANGER_SERVO_CONTROLLER](../../Jet%20Ranger%20Arduino%20Sketches/JET_RANGER_SERVO_CONTROLLER/JET_RANGER_SERVO_CONTROLLER.ino)</text:span> (<text:span text:style-name="CodeChar">172.16.1.102:13136</text:span>) — same relationship as with <text:span text:style-name="CodeChar">P3D_to_UDP</text:span>.</text:p>
      <text:list>
        <text:list-item>
          <text:p text:style-name="ListParaStyle"><text:span text:style-name="BoldChar">[JET_RANGER_UPPER_CONTROLLER](../../Jet%20Ranger%20Arduino%20Sketches/JET_RANGER_UPPER_CONTROLLER/JET_RANGER_UPPER_CONTROLLER.ino)</text:span> — potential sender of control commands to port 27001.</text:p>
        </text:list-item>
        <text:list-item>
          <text:p text:style-name="ListParaStyle">Mutually exclusive alternatives — run this one when MSFS (not Prepar3D) is the active sim: <text:span text:style-name="BoldChar">P3D_to_UDP</text:span> and</text:p>
        </text:list-item>
      </text:list>
      <text:p text:style-name="BodyStyle"><text:span text:style-name="BoldChar">MSFSSimConnectExtractor</text:span> should not be run at the same time as this app (all three would fight over UDP port 27001 and duplicate traffic to the boards).</text:p>
      <text:h text:outline-level="2" text:style-name="H1Style">MSFSSimConnectExtractor (WindowsFormsApp2 / SimConnect_To_IP) — Program Summary</text:h>
      <text:p text:style-name="BodyStyle">The oldest of the three MSFS/Prepar3D bridge apps (solution name <text:span text:style-name="CodeChar">SimConnect_to_IP.sln</text:span>, project <text:span text:style-name="CodeChar">WindowsFormsApp2</text:span>, executable class <text:span text:style-name="CodeChar">frmMain</text:span> in namespace <text:span text:style-name="CodeChar">WindowsFormsApp2</text:span>). Built against <text:span text:style-name="CodeChar">Microsoft.FlightSimulator.SimConnect</text:span>. Functionally the same shape as <text:span text:style-name="CodeChar">SimConnect_to_UDP</text:span> and <text:span text:style-name="CodeChar">P3D_to_UDP</text:span> — reads sim data, maps it to servo positions, streams it to the panel boards over UDP, and turns inbound panel commands into SimConnect events — but an earlier revision: its servo tables have 16 entries (no <text:span text:style-name="CodeChar">Fuel_Load</text:span>/<text:span text:style-name="CodeChar">Electrical_Load</text:span> columns yet) and its <text:span text:style-name="CodeChar">IAS_Process</text:span>/<text:span text:style-name="CodeChar">ITT_Process</text:span> switches use exact-value cases instead of range comparisons. The project folder also contains a <text:span text:style-name="CodeChar">.odt</text:span> write-up, <text:span text:style-name="BoldChar">"Jet Ranger MSFS UDP Exporter Explanations.odt"</text:span>, with the author's own notes on this exporter (not parsed here — open directly in a word processor for the prose explanation).</text:p>
      <text:h text:outline-level="3" text:style-name="H2Style">Program flow</text:h>
      <text:p text:style-name="BodyStyle">1. Constructor connects the outbound UDP clients, calls <text:span text:style-name="CodeChar">StartListener()</text:span>, and zeroes the servo-position array. 2. <text:span text:style-name="BoldChar">Connect</text:span> button opens <text:span text:style-name="CodeChar">SimConnect("Managed Data Request", ...)</text:span>; <text:span text:style-name="CodeChar">initDataRequest()</text:span> registers <text:span text:style-name="CodeChar">Struct1</text:span>/<text:span text:style-name="CodeChar">StructRadio</text:span>/<text:span text:style-name="CodeChar">StructFrontPanel</text:span> and requests <text:span text:style-name="CodeChar">StructFrontPanel</text:span> every sim frame. 3. <text:span text:style-name="CodeChar">simconnect_OnRecvSimobjectData()</text:span> builds and sends the same two packet types as the other two bridge apps: a compact radio/bus-voltage packet to the Radio Controller, and a larger instrument-data packet to the Servo Controller, throttled to ~200ms with a 5s forced refresh. 4. <text:span text:style-name="CodeChar">StartListener()</text:span> (UDP port 27001) receives control strings from the panel and routes them through <text:span text:style-name="CodeChar">UpdateRadios()</text:span> to the same command set (radio swap, avionics/battery/alternator on/off, standby-frequency float) as the newer variants.</text:p>
      <text:h text:outline-level="3" text:style-name="H2Style">SimConnect data read</text:h>
      <text:p text:style-name="BodyStyle">Same SimVar family as the other two bridges (altitude, airspeed, VSI, radar altitude, bank/pitch, rotor &amp; engine RPM, torque, ITT, oil pressure/temp, transmission pressure/temp, fuel qty, N1, electrical load/master battery/main bus voltage, COM/NAV frequencies, NAVCOM1 circuit state) — 16-servo table (predates the Fuel Load/Electrical Load servos added later in <text:span text:style-name="CodeChar">JET_RANGER_SERVO_CONTROLLER</text:span>/<text:span text:style-name="CodeChar">ServoTuner</text:span>/the other two bridge apps).</text:p>
      <text:h text:outline-level="3" text:style-name="H2Style">Local network configuration</text:h>
      <table:table table:name="Table22"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23"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 (no send code active)</text:p>
          </table:table-cell>
        </table:table-row>
      </table:table>
      <text:h text:outline-level="3" text:style-name="H2Style">Programs this communicates with</text:h>
      <text:list>
        <text:list-item>
          <text:p text:style-name="ListParaStyle"><text:span text:style-name="BoldChar">Microsoft Flight Simulator</text:span> (local SimConnect session).</text:p>
        </text:list-item>
        <text:list-item>
          <text:p text:style-name="ListParaStyle"><text:span text:style-name="BoldChar">[JET_RANGER_RADIO_CONTROLLER](../../Jet%20Ranger%20Arduino%20Sketches/JET_RANGER_RADIO_CONTROLLER/JET_RANGER_RADIO_CONTROLLER.ino)</text:span> (<text:span text:style-name="CodeChar">172.16.1.101:13136</text:span>) and</text:p>
        </text:list-item>
      </text:list>
      <text:p text:style-name="BodyStyle"><text:span text:style-name="BoldChar">[JET_RANGER_SERVO_CONTROLLER](../../Jet%20Ranger%20Arduino%20Sketches/JET_RANGER_SERVO_CONTROLLER/JET_RANGER_SERVO_CONTROLLER.ino)</text:span> (<text:span text:style-name="CodeChar">172.16.1.102:13136</text:span>).</text:p>
      <text:list>
        <text:list-item>
          <text:p text:style-name="ListParaStyle"><text:span text:style-name="BoldChar">[JET_RANGER_UPPER_CONTROLLER](../../Jet%20Ranger%20Arduino%20Sketches/JET_RANGER_UPPER_CONTROLLER/JET_RANGER_UPPER_CONTROLLER.ino)</text:span> — potential sender of control commands to port 27001.</text:p>
        </text:list-item>
        <text:list-item>
          <text:p text:style-name="ListParaStyle">Superseded by / duplicate-purpose with <text:span text:style-name="BoldChar">SimConnect_to_UDP</text:span> (a newer revision of the same MSFS bridge) and <text:span text:style-name="BoldChar">P3D_to_UDP</text:span> (the Prepar3D equivalent) — only one of the three should be running against the panel network at a time.</text:p>
        </text:list-item>
      </text:list>
      <text:h text:outline-level="2" text:style-name="H1Style">FSUIPCWinformsAutoCS — Program Summary</text:h>
      <text:p text:style-name="BodyStyle">A fourth sim-bridge variant, but reading data through <text:span text:style-name="BoldChar">FSUIPC</text:span> (raw memory offsets, typically used with FSX/P3D via the FSUIPC add-on) instead of SimConnect. Named <text:span text:style-name="CodeChar">FSUIPCTest</text:span> internally — reads engine/electrical/ radio/annunciator offsets and streams the same style of <text:span text:style-name="CodeChar">"D,ALT:...,IAS:..."</text:span> UDP packet to the Servo Controller board that the SimConnect-based bridges send. Unlike those, its inbound command listener (port 27001) is declared but never started, so it currently only pushes data out — it can't relay radio-swap/battery/alternator commands from the panel back into the sim.</text:p>
      <text:h text:outline-level="3" text:style-name="H2Style">Program flow</text:h>
      <text:p text:style-name="BodyStyle">1. <text:span text:style-name="BoldChar">Constructor</text:span>: calls <text:span text:style-name="CodeChar">configureForm()</text:span>, builds a live annunciator light list (<text:span text:style-name="CodeChar">BuildLightList()</text:span>, one row per bit in the 0x2F28 annunciator offset), and starts <text:span text:style-name="CodeChar">timerConnection</text:span> (polls once/second looking for FSUIPC). 2. <text:span text:style-name="BoldChar">`timerConnection_Tick`</text:span>: repeatedly tries <text:span text:style-name="CodeChar">FSUIPCConnection.Open()</text:span>; once it succeeds, stops itself and starts <text:span text:style-name="CodeChar">timerMain</text:span> (ticks every 50ms). 3. <text:span text:style-name="BoldChar">`timerMain_Tick`</text:span> (20Hz):</text:p>
      <text:list>
        <text:list-item>
          <text:p text:style-name="ListParaStyle">Calls <text:span text:style-name="CodeChar">FSUIPCConnection.Process()</text:span> to refresh all declared offsets (airspeed, avionics master, turbine-out %, gas producer, oil pressure/temp, transmission pressure/temp, fuel qty/capacity, battery load amps, fuel pressure, torque, rotor RPM, engine N2, altitude, VSI, radar altimeter, attitude pitch/bank, main/avionics bus voltage) and the separate <text:span text:style-name="CodeChar">"RadioStack"</text:span> offset group (COM1/2 active+standby, NAV1/2 active+standby, ADF, transponder).</text:p>
        </text:list-item>
        <text:list-item>
          <text:p text:style-name="ListParaStyle">Formats a human-readable summary into <text:span text:style-name="CodeChar">textBox1</text:span> for on-screen debugging.</text:p>
        </text:list-item>
        <text:list-item>
          <text:p text:style-name="ListParaStyle">Reads the 21-bit annunciator field (<text:span text:style-name="CodeChar">_annunciators</text:span>, offset <text:span text:style-name="CodeChar">0x2F28</text:span>) and updates the on-screen light list (<text:span text:style-name="CodeChar">UpdateLights</text:span>).</text:p>
        </text:list-item>
        <text:list-item>
          <text:p text:style-name="ListParaStyle">Runs each changed instrument value through the matching <text:span text:style-name="CodeChar">&lt;CODE&gt;_Process()</text:span> mapping function (same formulas/tables as <text:span text:style-name="CodeChar">JET_RANGER_SERVO_CONTROLLER</text:span>/<text:span text:style-name="CodeChar">ServoTuner</text:span>/the SimConnect bridges) and appends it to a <text:span text:style-name="CodeChar">"D,..."</text:span> payload, along with every annunciator's on/off state by short code.</text:p>
        </text:list-item>
        <text:list-item>
          <text:p text:style-name="ListParaStyle">Throttled to ≥200ms between sends, the accumulated payload is sent to the Servo Controller board.</text:p>
        </text:list-item>
      </text:list>
      <text:p text:style-name="BodyStyle">4. <text:span text:style-name="BoldChar">`chkAvionicsMaster_CheckedChanged`</text:span>: writes back to the avionics master FSUIPC offset when the operator toggles the checkbox — this is the only two-way interaction in the app; there is no equivalent for radio/battery/alternator commands coming from the physical panel. 5. <text:span text:style-name="BoldChar">`frmMain_FormClosing`</text:span> stops both timers and closes the FSUIPC connection.</text:p>
      <text:h text:outline-level="3" text:style-name="H2Style">FSUIPC offsets read/written</text:h>
      <table:table table:name="Table24" table:style-name="SummaryTable">
        <table:table-column table:style-name="SummaryTableCol"/>
        <table:table-column table:style-name="SummaryTableCol"/>
        <table:table-row>
          <table:table-cell table:style-name="SummaryTableHeadCell">
            <text:p>Offset</text:p>
          </table:table-cell>
          <table:table-cell table:style-name="SummaryTableHeadCell">
            <text:p>Meaning</text:p>
          </table:table-cell>
        </table:table-row>
        <table:table-row>
          <table:table-cell table:style-name="SummaryTableDataCell">
            <text:p><text:span text:style-name="CodeChar">0x02BC</text:span></text:p>
          </table:table-cell>
          <table:table-cell table:style-name="SummaryTableDataCell">
            <text:p>Airspeed</text:p>
          </table:table-cell>
        </table:table-row>
        <table:table-row>
          <table:table-cell table:style-name="SummaryTableDataCell">
            <text:p><text:span text:style-name="CodeChar">0x2E80</text:span></text:p>
          </table:table-cell>
          <table:table-cell table:style-name="SummaryTableDataCell">
            <text:p>Avionics master (read/write)</text:p>
          </table:table-cell>
        </table:table-row>
        <table:table-row>
          <table:table-cell table:style-name="SummaryTableDataCell">
            <text:p><text:span text:style-name="CodeChar">0x08F0</text:span></text:p>
          </table:table-cell>
          <table:table-cell table:style-name="SummaryTableDataCell">
            <text:p>Turbine-out % / turbine-out temperature</text:p>
          </table:table-cell>
        </table:table-row>
        <table:table-row>
          <table:table-cell table:style-name="SummaryTableDataCell">
            <text:p><text:span text:style-name="CodeChar">0x08BA</text:span> / <text:span text:style-name="CodeChar">0x08B8</text:span></text:p>
          </table:table-cell>
          <table:table-cell table:style-name="SummaryTableDataCell">
            <text:p>Engine oil pressure / temperature</text:p>
          </table:table-cell>
        </table:table-row>
        <table:table-row>
          <table:table-cell table:style-name="SummaryTableDataCell">
            <text:p><text:span text:style-name="CodeChar">0x0900</text:span> / <text:span text:style-name="CodeChar">0x0904</text:span></text:p>
          </table:table-cell>
          <table:table-cell table:style-name="SummaryTableDataCell">
            <text:p>Transmission oil pressure / temperature</text:p>
          </table:table-cell>
        </table:table-row>
        <table:table-row>
          <table:table-cell table:style-name="SummaryTableDataCell">
            <text:p><text:span text:style-name="CodeChar">0x0B74</text:span> / <text:span text:style-name="CodeChar">0x0B78</text:span></text:p>
          </table:table-cell>
          <table:table-cell table:style-name="SummaryTableDataCell">
            <text:p>Fuel percent quantity / fuel capacity</text:p>
          </table:table-cell>
        </table:table-row>
        <table:table-row>
          <table:table-cell table:style-name="SummaryTableDataCell">
            <text:p><text:span text:style-name="CodeChar">0x282C</text:span></text:p>
          </table:table-cell>
          <table:table-cell table:style-name="SummaryTableDataCell">
            <text:p>Battery load amps</text:p>
          </table:table-cell>
        </table:table-row>
        <table:table-row>
          <table:table-cell table:style-name="SummaryTableDataCell">
            <text:p><text:span text:style-name="CodeChar">0x08F8</text:span></text:p>
          </table:table-cell>
          <table:table-cell table:style-name="SummaryTableDataCell">
            <text:p>Fuel pressure</text:p>
          </table:table-cell>
        </table:table-row>
        <table:table-row>
          <table:table-cell table:style-name="SummaryTableDataCell">
            <text:p><text:span text:style-name="CodeChar">0x08F4</text:span></text:p>
          </table:table-cell>
          <table:table-cell table:style-name="SummaryTableDataCell">
            <text:p>Torque percent</text:p>
          </table:table-cell>
        </table:table-row>
        <table:table-row>
          <table:table-cell table:style-name="SummaryTableDataCell">
            <text:p><text:span text:style-name="CodeChar">0x0898</text:span></text:p>
          </table:table-cell>
          <table:table-cell table:style-name="SummaryTableDataCell">
            <text:p>Gas producer</text:p>
          </table:table-cell>
        </table:table-row>
        <table:table-row>
          <table:table-cell table:style-name="SummaryTableDataCell">
            <text:p><text:span text:style-name="CodeChar">0x0908</text:span> / <text:span text:style-name="CodeChar">0x0896</text:span></text:p>
          </table:table-cell>
          <table:table-cell table:style-name="SummaryTableDataCell">
            <text:p>Rotor RPM / engine N2</text:p>
          </table:table-cell>
        </table:table-row>
        <table:table-row>
          <table:table-cell table:style-name="SummaryTableDataCell">
            <text:p><text:span text:style-name="CodeChar">0x3324</text:span></text:p>
          </table:table-cell>
          <table:table-cell table:style-name="SummaryTableDataCell">
            <text:p>Altitude</text:p>
          </table:table-cell>
        </table:table-row>
        <table:table-row>
          <table:table-cell table:style-name="SummaryTableDataCell">
            <text:p><text:span text:style-name="CodeChar">0x02C8</text:span></text:p>
          </table:table-cell>
          <table:table-cell table:style-name="SummaryTableDataCell">
            <text:p>Vertical speed</text:p>
          </table:table-cell>
        </table:table-row>
        <table:table-row>
          <table:table-cell table:style-name="SummaryTableDataCell">
            <text:p><text:span text:style-name="CodeChar">0x31E4</text:span></text:p>
          </table:table-cell>
          <table:table-cell table:style-name="SummaryTableDataCell">
            <text:p>Radio altimeter</text:p>
          </table:table-cell>
        </table:table-row>
        <table:table-row>
          <table:table-cell table:style-name="SummaryTableDataCell">
            <text:p><text:span text:style-name="CodeChar">0x2F70</text:span> / <text:span text:style-name="CodeChar">0x2F78</text:span></text:p>
          </table:table-cell>
          <table:table-cell table:style-name="SummaryTableDataCell">
            <text:p>Attitude pitch / bank</text:p>
          </table:table-cell>
        </table:table-row>
        <table:table-row>
          <table:table-cell table:style-name="SummaryTableDataCell">
            <text:p><text:span text:style-name="CodeChar">0x2F28</text:span></text:p>
          </table:table-cell>
          <table:table-cell table:style-name="SummaryTableDataCell">
            <text:p>21-bit annunciator/warning-lamp bitfield</text:p>
          </table:table-cell>
        </table:table-row>
        <table:table-row>
          <table:table-cell table:style-name="SummaryTableDataCell">
            <text:p><text:span text:style-name="CodeChar">0x2840</text:span> / <text:span text:style-name="CodeChar">0x2850</text:span></text:p>
          </table:table-cell>
          <table:table-cell table:style-name="SummaryTableDataCell">
            <text:p>Main bus voltage / avionics bus voltage</text:p>
          </table:table-cell>
        </table:table-row>
        <table:table-row>
          <table:table-cell table:style-name="SummaryTableDataCell">
            <text:p><text:span text:style-name="CodeChar">RadioStack:0x034E/0x311A/0x3118/0x311C/0x0350/0x311E/0x0352/0x3120/0x0354/0x034C/0x0356</text:span></text:p>
          </table:table-cell>
          <table:table-cell table:style-name="SummaryTableDataCell">
            <text:p>COM1/2 active+standby, NAV1/2 active+standby, transponder, ADF</text:p>
          </table:table-cell>
        </table:table-row>
      </table:table>
      <text:h text:outline-level="3" text:style-name="H2Style">Local network configuration</text:h>
      <table:table table:name="Table25"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27001 declared (<text:span text:style-name="CodeChar">listenPort</text:span>/<text:span text:style-name="CodeChar">udpServer</text:span> fields exist) but <text:span text:style-name="BoldChar">never bound or started</text:span> — no <text:span text:style-name="CodeChar">StartListener()</text:span> call exists in this app, so it does not actually receive panel commands</text:p>
          </table:table-cell>
        </table:table-row>
      </table:table>
      <text:h text:outline-level="3" text:style-name="H2Style">Remote endpoints this app talks to</text:h>
      <table:table table:name="Table26"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text:span text:style-name="CodeChar">udpClient</text:span> connected but no send code targets it in the reviewed flow</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 annunciator data packets (<text:span text:style-name="CodeChar">frontPanelClient.Send</text:span>)</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text:p>
          </table:table-cell>
        </table:table-row>
      </table:table>
      <text:p text:style-name="NoteStyle">Note: the three <text:span text:style-name="CodeChar">.Connect(...)</text:span> calls that wire up these targets live in <text:span text:style-name="CodeChar">Form1.Designer.cs</text:span> rather than <text:span text:style-name="CodeChar">Form1.cs</text:span>'s constructor — an unusual location (that file is normally generated UI layout only) but functionally equivalent since it still runs during <text:span text:style-name="CodeChar">InitializeComponent()</text:span>.</text:p>
      <text:h text:outline-level="3" text:style-name="H2Style">Programs this communicates with</text:h>
      <text:list>
        <text:list-item>
          <text:p text:style-name="ListParaStyle"><text:span text:style-name="BoldChar">FSUIPC</text:span> (must be installed/running, bridging to FSX/P3D) — data source.</text:p>
        </text:list-item>
        <text:list-item>
          <text:p text:style-name="ListParaStyle"><text:span text:style-name="BoldChar">[JET_RANGER_SERVO_CONTROLLER](../../Jet%20Ranger%20Arduino%20Sketches/JET_RANGER_SERVO_CONTROLLER/JET_RANGER_SERVO_CONTROLLER.ino)</text:span> (<text:span text:style-name="CodeChar">172.16.1.102:13136</text:span>) — receives this app's instrument/annunciator data.</text:p>
        </text:list-item>
        <text:list-item>
          <text:p text:style-name="ListParaStyle"><text:span text:style-name="BoldChar">[JET_RANGER_RADIO_CONTROLLER](../../Jet%20Ranger%20Arduino%20Sketches/JET_RANGER_RADIO_CONTROLLER/JET_RANGER_RADIO_CONTROLLER.ino)</text:span> — a UDP client is connected to it but this app has no code path that sends radio data, so in practice it does not drive the radio panel.</text:p>
        </text:list-item>
        <text:list-item>
          <text:p text:style-name="ListParaStyle">Alternative to the SimConnect-based bridges (<text:span text:style-name="BoldChar">P3D_to_UDP</text:span> /</text:p>
        </text:list-item>
      </text:list>
      <text:p text:style-name="BodyStyle"><text:span text:style-name="BoldChar">SimConnect_to_UDP</text:span> / <text:span text:style-name="BoldChar">MSFSSimConnectExtractor</text:span>) for sims that only expose data via FSUIPC rather than SimConnect — only one bridge app should run against the panel network at a time.</text:p>
      <text:h text:outline-level="2" text:style-name="H1Style">JetRangerHealthMonitor — Program Summary</text:h>
      <text:p text:style-name="BodyStyle">Small WinForms dashboard (namespace <text:span text:style-name="CodeChar">MegaHealthMonitor</text:span>) that watches for the 10-second UDP heartbeat strings sent by every networked Arduino board in the panel and shows a Comm/Nav, Servo, Joystick and Upper-Input traffic light so an operator can see at a glance which boards are alive.</text:p>
      <text:h text:outline-level="3" text:style-name="H2Style">Program flow</text:h>
      <text:p text:style-name="BodyStyle">1. <text:span text:style-name="BoldChar">`Form1_Load`</text:span> calls <text:span text:style-name="CodeChar">StartListener()</text:span>, which starts a background task binding a <text:span text:style-name="CodeChar">UdpClient</text:span> to the listen port below and looping <text:span text:style-name="CodeChar">ReceiveAsync()</text:span> forever. 2. On each received packet, the payload is matched by prefix:</text:p>
      <text:list>
        <text:list-item>
          <text:p text:style-name="ListParaStyle"><text:span text:style-name="CodeChar">"COMM_NAV"</text:span> → updates <text:span text:style-name="CodeChar">CommNavLastReceived</text:span>, turns the CommNav label green.</text:p>
        </text:list-item>
        <text:list-item>
          <text:p text:style-name="ListParaStyle"><text:span text:style-name="CodeChar">"SERVO"</text:span> → updates <text:span text:style-name="CodeChar">ServoLastReceived</text:span>, turns the Servo label green.</text:p>
        </text:list-item>
        <text:list-item>
          <text:p text:style-name="ListParaStyle"><text:span text:style-name="CodeChar">"JOYSTICK"</text:span> → updates <text:span text:style-name="CodeChar">JoyStickLastReceived</text:span>, turns the JoyStick label green.</text:p>
        </text:list-item>
        <text:list-item>
          <text:p text:style-name="ListParaStyle"><text:span text:style-name="CodeChar">"UPPER_INPUT"</text:span> → updates <text:span text:style-name="CodeChar">UpperInputLastReceived</text:span>, turns the Upper Input label green. Each match is optionally logged (sender endpoint + timestamp) to a list box.</text:p>
        </text:list-item>
      </text:list>
      <text:p text:style-name="BodyStyle">3. A timer (<text:span text:style-name="CodeChar">tmrHealthCheck_Tick</text:span>) calls <text:span text:style-name="CodeChar">CheckHealth()</text:span> roughly once a second: for each of the four boards, if it's been ≥30s since its last packet the indicator turns <text:span text:style-name="BoldChar">red</text:span> ("connection lost"); ≥15s turns it <text:span text:style-name="BoldChar">orange</text:span> ("connection warning"); otherwise it stays green. 4. <text:span text:style-name="CodeChar">cmdToggleLogs_Click</text:span> shows/hides the log list box and resizes the form.</text:p>
      <text:h text:outline-level="3" text:style-name="H2Style">Local network configuration</text:h>
      <table:table table:name="Table2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13137</text:span> — receives keepalive strings from all four boards</text:p>
          </table:table-cell>
        </table:table-row>
      </table:table>
      <text:h text:outline-level="3" text:style-name="H2Style">Remote endpoints this app talks to</text:h>
      <text:p text:style-name="BodyStyle">None outbound — this is a passive listener only; it never sends packets.</text:p>
      <text:h text:outline-level="3" text:style-name="H2Style">Programs this communicates with</text:h>
      <text:p text:style-name="BodyStyle">Listens for UDP keepalives from all four networked panel boards (no reply is sent back to any of them):</text:p>
      <text:list>
        <text:list-item>
          <text:p text:style-name="ListParaStyle"><text:span text:style-name="BoldChar">[JET_RANGER_RADIO_CONTROLLER](../../Jet%20Ranger%20Arduino%20Sketches/JET_RANGER_RADIO_CONTROLLER/JET_RANGER_RADIO_CONTROLLER.ino)</text:span> — <text:span text:style-name="CodeChar">"COMM_NAV"</text:span> every 10s.</text:p>
        </text:list-item>
        <text:list-item>
          <text:p text:style-name="ListParaStyle"><text:span text:style-name="BoldChar">[JET_RANGER_SERVO_CONTROLLER](../../Jet%20Ranger%20Arduino%20Sketches/JET_RANGER_SERVO_CONTROLLER/JET_RANGER_SERVO_CONTROLLER.ino)</text:span> — <text:span text:style-name="CodeChar">"SERVO"</text:span> every 10s.</text:p>
        </text:list-item>
        <text:list-item>
          <text:p text:style-name="ListParaStyle"><text:span text:style-name="BoldChar">[JET_RANGER_UPPER_CONTROLLER](../../Jet%20Ranger%20Arduino%20Sketches/JET_RANGER_UPPER_CONTROLLER/JET_RANGER_UPPER_CONTROLLER.ino)</text:span> — <text:span text:style-name="CodeChar">"UPPER_INPUT"</text:span> every 10s.</text:p>
        </text:list-item>
        <text:list-item>
          <text:p text:style-name="ListParaStyle"><text:span text:style-name="BoldChar">[UDP_TO_HID](../../Jet%20Ranger%20Arduino%20Sketches/UDP_TO_HID/UDP_TO_HID.ino)</text:span> — <text:span text:style-name="CodeChar">"JOYSTICK"</text:span> every 10s.</text:p>
        </text:list-item>
      </text:list>
      <text:p text:style-name="BodyStyle">No dependency on which sim-bridge app (<text:span text:style-name="CodeChar">P3D_to_UDP</text:span> / <text:span text:style-name="CodeChar">SimConnect_to_UDP</text:span> / <text:span text:style-name="CodeChar">MSFSSimConnectExtractor</text:span>) is running — this monitor only cares about the Arduino boards, not the flight sim connection.</text:p>
      <text:h text:outline-level="2" text:style-name="H1Style">ServoTuner — Program Summary</text:h>
      <text:p text:style-name="BodyStyle">Standalone WinForms calibration tool used to find/verify each gauge servo's min/max/zero pulse-position values on the Servo Controller board, without needing a flight sim running. An operator picks a servo from a list, either drags a scrollbar or types a raw/"converted" test value, and the tool sends the equivalent <text:span text:style-name="CodeChar">"D,&lt;CODE&gt;:&lt;value&gt;"</text:span> packet the sim-bridge apps would normally generate.</text:p>
      <text:h text:outline-level="3" text:style-name="H2Style">Program flow</text:h>
      <text:p text:style-name="BodyStyle">1. <text:span text:style-name="BoldChar">Constructor</text:span>: populates the servo list box from the <text:span text:style-name="CodeChar">Servos</text:span> enum, selects <text:span text:style-name="CodeChar">EngTorquePercent1</text:span> by default, calls <text:span text:style-name="CodeChar">UpdateLabels()</text:span>, and connects <text:span text:style-name="CodeChar">frontPanelClient</text:span> to the Servo Controller board. 2. <text:span text:style-name="BoldChar">`lstServos_SelectedIndexChanged`</text:span> → <text:span text:style-name="CodeChar">UpdateLabels()</text:span> shows the selected servo's short code and its configured min/max position. 3. <text:span text:style-name="BoldChar">Scrollbar (`vScrollBar1_Scroll`)</text:span>: clamps the new value to the selected servo's min/max range (handling either min&gt;max or min&lt;max orientation), updates the label, and immediately sends <text:span text:style-name="CodeChar">"D,&lt;CODE&gt;:&lt;rawValue&gt;"</text:span> to the board — i.e. drives the servo directly by raw position, bypassing any unit conversion. 4. <text:span text:style-name="BoldChar">"Send Manual Value" (`SendManualValue`)</text:span>: parses <text:span text:style-name="CodeChar">txtRawInput</text:span>, checks it's within range, and sends it the same way as the scrollbar. 5. <text:span text:style-name="BoldChar">"Send Converted Value" (`SendConvertedValue`)</text:span>: parses <text:span text:style-name="CodeChar">txtConvertedInput</text:span> as an instrument-unit value (knots, %, °, PSI, etc.), runs it through the matching <text:span text:style-name="CodeChar">&lt;CODE&gt;_Process()</text:span> mapping function (identical formulas to the ones in <text:span text:style-name="CodeChar">JET_RANGER_SERVO_CONTROLLER</text:span> and the three sim-bridge apps), and sends the resulting raw position — i.e. this button simulates what the sim bridge would compute for a given real-world instrument reading.</text:p>
      <text:h text:outline-level="3" text:style-name="H2Style">Local network configuration / IP addresses</text:h>
      <text:p text:style-name="BodyStyle">None locally bound — this tool only sends, it doesn't listen for anything.</text:p>
      <text:h text:outline-level="3" text:style-name="H2Style">Remote endpoints this app talks to</text:h>
      <table:table table:name="Table28"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Manual/converted <text:span text:style-name="CodeChar">"D,&lt;CODE&gt;:&lt;value&gt;"</text:span> test packets</text:p>
          </table:table-cell>
        </table:table-row>
      </table:table>
      <text:h text:outline-level="3" text:style-name="H2Style">Programs this communicates with</text:h>
      <text:list>
        <text:list-item>
          <text:p text:style-name="ListParaStyle"><text:span text:style-name="BoldChar">[JET_RANGER_SERVO_CONTROLLER](../../Jet%20Ranger%20Arduino%20Sketches/JET_RANGER_SERVO_CONTROLLER/JET_RANGER_SERVO_CONTROLLER.ino)</text:span> (<text:span text:style-name="CodeChar">172.16.1.102:13136</text:span>) — the sole target; this tool is meant to be run</text:p>
        </text:list-item>
      </text:list>
      <text:p text:style-name="BodyStyle">*instead of* the sim-bridge apps (<text:span text:style-name="CodeChar">P3D_to_UDP</text:span>/<text:span text:style-name="CodeChar">SimConnect_to_UDP</text:span>/ <text:span text:style-name="CodeChar">MSFSSimConnectExtractor</text:span>) while calibrating, since both would otherwise fight over which value is currently driving each servo.</text:p>
      <text:h text:outline-level="2" text:style-name="H1Style">cmdlineWarningMute — Program Summary</text:h>
      <text:p text:style-name="BodyStyle">Tiny one-shot CLI utility (namespace <text:span text:style-name="CodeChar">DS206EventTrigger</text:span>) that toggles a single custom FSUIPC control on and off — used as a manual workaround/test for the DodoSim Bell 206 add-on's generator switch, which apparently isn't reachable through a normal SimConnect event.</text:p>
      <text:h text:outline-level="3" text:style-name="H2Style">Program flow</text:h>
      <text:p text:style-name="BodyStyle">1. Opens an FSUIPC connection (<text:span text:style-name="CodeChar">FSUIPCConnection.Open()</text:span>). 2. <text:span text:style-name="CodeChar">SetCustomEvent(32884, 0)</text:span> — writes the parameter offset (<text:span text:style-name="CodeChar">0x3114</text:span>) first and flushes it, then writes the control-number offset (<text:span text:style-name="CodeChar">0x3110</text:span>, the "confirmed via FSUIPC6.log" generator-switch control ID 32884) and flushes it, which fires the control with that parameter. Logs each step with a timestamp. 3. Sleeps 2 seconds. 4. Repeats <text:span text:style-name="CodeChar">SetCustomEvent(32884, 1)</text:span> to flip the switch back. 5. Closes the FSUIPC connection and exits.</text:p>
      <text:h text:outline-level="3" text:style-name="H2Style">FSUIPC offsets used</text:h>
      <table:table table:name="Table29" table:style-name="SummaryTable">
        <table:table-column table:style-name="SummaryTableCol"/>
        <table:table-column table:style-name="SummaryTableCol"/>
        <table:table-row>
          <table:table-cell table:style-name="SummaryTableHeadCell">
            <text:p>Offset</text:p>
          </table:table-cell>
          <table:table-cell table:style-name="SummaryTableHeadCell">
            <text:p>Meaning</text:p>
          </table:table-cell>
        </table:table-row>
        <table:table-row>
          <table:table-cell table:style-name="SummaryTableDataCell">
            <text:p><text:span text:style-name="CodeChar">0x3110</text:span></text:p>
          </table:table-cell>
          <table:table-cell table:style-name="SummaryTableDataCell">
            <text:p>Custom control number (<text:span text:style-name="CodeChar">ControlNumber</text:span>) — set to <text:span text:style-name="CodeChar">32884</text:span> (generator switch)</text:p>
          </table:table-cell>
        </table:table-row>
        <table:table-row>
          <table:table-cell table:style-name="SummaryTableDataCell">
            <text:p><text:span text:style-name="CodeChar">0x3114</text:span></text:p>
          </table:table-cell>
          <table:table-cell table:style-name="SummaryTableDataCell">
            <text:p>Custom control parameter (<text:span text:style-name="CodeChar">ControlParam</text:span>) — <text:span text:style-name="CodeChar">0</text:span> then <text:span text:style-name="CodeChar">1</text:span></text:p>
          </table:table-cell>
        </table:table-row>
      </table:table>
      <text:h text:outline-level="3" text:style-name="H2Style">Local network configuration / IP addresses</text:h>
      <text:p text:style-name="BodyStyle">None — FSUIPC-only, no sockets.</text:p>
      <text:h text:outline-level="3" text:style-name="H2Style">Programs this communicates with</text:h>
      <text:list>
        <text:list-item>
          <text:p text:style-name="ListParaStyle"><text:span text:style-name="BoldChar">FSUIPC</text:span> (must be running, bridging to FSX/P3D) — the sole interaction; no Arduino boards or other C# projects are involved. This is a standalone diagnostic/workaround tool, not part of the panel network's normal runtime.</text:p>
        </text:list-item>
      </text:list>
      <text:h text:outline-level="2" text:style-name="H1Style">setcomstandby — Program Summary</text:h>
      <text:p text:style-name="BodyStyle">Tiny interactive console tool (namespace <text:span text:style-name="CodeChar">SimConnectFlightControl</text:span>) for firing individual SimConnect events by hand, without needing the full panel-network sim-bridge app running — useful for isolating whether a given SimConnect event actually works in the currently-loaded aircraft.</text:p>
      <text:h text:outline-level="3" text:style-name="H2Style">Program flow</text:h>
      <text:p text:style-name="BodyStyle">1. Opens a <text:span text:style-name="CodeChar">SimConnect("Flight Controller", ...)</text:span> session and maps two client events: <text:span text:style-name="CodeChar">MASTER_BATTERY_SET</text:span> and <text:span text:style-name="CodeChar">COM_STBY_RADIO_SET</text:span>. 2. Loops reading console key presses:</text:p>
      <text:list>
        <text:list-item>
          <text:p text:style-name="ListParaStyle"><text:span text:style-name="BoldChar">B</text:span> → <text:span text:style-name="CodeChar">TurnOffBattery()</text:span>: transmits <text:span text:style-name="CodeChar">KEY_MASTER_BATTERY_SET</text:span> with parameter <text:span text:style-name="CodeChar">0</text:span>.</text:p>
        </text:list-item>
        <text:list-item>
          <text:p text:style-name="ListParaStyle"><text:span text:style-name="BoldChar">C</text:span> → <text:span text:style-name="CodeChar">SetCom1Standby()</text:span>: transmits <text:span text:style-name="CodeChar">KEY_COM_STBY_RADIO_SET</text:span> with a hard-coded BCD value <text:span text:style-name="CodeChar">0x2150</text:span> (121.50 MHz).</text:p>
        </text:list-item>
        <text:list-item>
          <text:p text:style-name="ListParaStyle"><text:span text:style-name="BoldChar">Esc</text:span> → exits the loop and the program.</text:p>
        </text:list-item>
      </text:list>
      <text:h text:outline-level="3" text:style-name="H2Style">Local network configuration / IP addresses</text:h>
      <text:p text:style-name="BodyStyle">None — SimConnect-only, no sockets.</text:p>
      <text:h text:outline-level="3" text:style-name="H2Style">Programs this communicates with</text:h>
      <text:list>
        <text:list-item>
          <text:p text:style-name="ListParaStyle"><text:span text:style-name="BoldChar">Microsoft Flight Simulator / Prepar3D</text:span> (local SimConnect session) — the sole interaction. No Arduino boards or other C# projects involved; this is a standalone manual test tool, not part of the panel network's normal runtime.</text:p>
        </text:list-item>
      </text:list>
      <text:h text:outline-level="2" text:style-name="H1Style">SCXPlatform (SimConnectCrossPlatform) — Program Summary</text:h>
      <text:p text:style-name="BodyStyle">A reusable <text:span text:style-name="BoldChar">library</text:span> (<text:span text:style-name="CodeChar">src/SimConnectCrossPlatform</text:span>) plus a small demo WinForms app (<text:span text:style-name="CodeChar">src/SimConnectCrossPlatform.WinFormsApp</text:span>) and unit tests (<text:span text:style-name="CodeChar">tests/SimConnectCrossPlatform.Tests</text:span>). Unlike every other project in this folder, this is not itself wired into the Jet Ranger panel network — it's an engineering effort to replace the copy-pasted SimConnect boilerplate shared by <text:span text:style-name="CodeChar">P3D_to_UDP</text:span>/<text:span text:style-name="CodeChar">SimConnect_to_UDP</text:span>/ <text:span text:style-name="CodeChar">MSFSSimConnectExtractor</text:span> with a single, properly layered library that can talk to <text:span text:style-name="BoldChar">either</text:span> MSFS2024 or Prepar3D at runtime, with automatic reconnection.</text:p>
      <text:p text:style-name="BodyStyle">"Cross-platform" here means *cross-simulator* (MSFS vs Prepar3D), not cross-OS — it's still a Windows-only WinForms/P/Invoke library.</text:p>
      <text:h text:outline-level="3" text:style-name="H2Style">Library architecture (<text:span text:style-name="CodeChar">src/SimConnectCrossPlatform</text:span>)</text:h>
      <table:table table:name="Table30" table:style-name="SummaryTable">
        <table:table-column table:style-name="SummaryTableCol"/>
        <table:table-column table:style-name="SummaryTableCol"/>
        <table:table-row>
          <table:table-cell table:style-name="SummaryTableHeadCell">
            <text:p>Folder/file</text:p>
          </table:table-cell>
          <table:table-cell table:style-name="SummaryTableHeadCell">
            <text:p>Role</text:p>
          </table:table-cell>
        </table:table-row>
        <table:table-row>
          <table:table-cell table:style-name="SummaryTableDataCell">
            <text:p><text:span text:style-name="CodeChar">Loader/SimConnectDynamicLoader.cs</text:span>, <text:span text:style-name="CodeChar">Win32Native.cs</text:span></text:p>
          </table:table-cell>
          <table:table-cell table:style-name="SummaryTableDataCell">
            <text:p>Locates and <text:span text:style-name="CodeChar">LoadLibrary</text:span>/<text:span text:style-name="CodeChar">GetProcAddress</text:span>-loads whichever <text:span text:style-name="CodeChar">SimConnect.dll</text:span> is actually installed (MSFS's or Prepar3D's) at runtime, so the app doesn't need to be recompiled per sim</text:p>
          </table:table-cell>
        </table:table-row>
        <table:table-row>
          <table:table-cell table:style-name="SummaryTableDataCell">
            <text:p><text:span text:style-name="CodeChar">Loader/ISimInterface.cs</text:span>, <text:span text:style-name="CodeChar">SimConnectDelegates.cs</text:span></text:p>
          </table:table-cell>
          <table:table-cell table:style-name="SummaryTableDataCell">
            <text:p>Defines a sim-agnostic interface + native function delegate signatures over the dynamically loaded DLL</text:p>
          </table:table-cell>
        </table:table-row>
        <table:table-row>
          <table:table-cell table:style-name="SummaryTableDataCell">
            <text:p><text:span text:style-name="CodeChar">Core/SimConnectInterface.cs</text:span></text:p>
          </table:table-cell>
          <table:table-cell table:style-name="SummaryTableDataCell">
            <text:p>Concrete <text:span text:style-name="CodeChar">ISimInterface</text:span> implementation wrapping the loaded SimConnect DLL</text:p>
          </table:table-cell>
        </table:table-row>
        <table:table-row>
          <table:table-cell table:style-name="SummaryTableDataCell">
            <text:p><text:span text:style-name="CodeChar">Reconnection/ReconnectingSimInterface.cs</text:span>, <text:span text:style-name="CodeChar">ReconnectionConfig.cs</text:span></text:p>
          </table:table-cell>
          <table:table-cell table:style-name="SummaryTableDataCell">
            <text:p>Wraps <text:span text:style-name="CodeChar">ISimInterface</text:span> with automatic reconnect/backoff and a heartbeat, exposing <text:span text:style-name="CodeChar">ConnectionStateChanged</text:span>/<text:span text:style-name="CodeChar">DataReceived</text:span>/<text:span text:style-name="CodeChar">ReconnectionAttempt</text:span>/<text:span text:style-name="CodeChar">ExceptionReceived</text:span> events</text:p>
          </table:table-cell>
        </table:table-row>
        <table:table-row>
          <table:table-cell table:style-name="SummaryTableDataCell">
            <text:p><text:span text:style-name="CodeChar">Models/DataDefinition.cs</text:span>, <text:span text:style-name="CodeChar">SimVarDefinition.cs</text:span>, <text:span text:style-name="CodeChar">SimValue.cs</text:span>, <text:span text:style-name="CodeChar">Enums.cs</text:span>, <text:span text:style-name="CodeChar">SimConnectConstants.cs</text:span>, <text:span text:style-name="CodeChar">SimEvents.cs</text:span></text:p>
          </table:table-cell>
          <table:table-cell table:style-name="SummaryTableDataCell">
            <text:p>Typed model classes for declaring data definitions/SimVars and reading back typed values (<text:span text:style-name="CodeChar">AsDouble()</text:span>, <text:span text:style-name="CodeChar">AsInt()</text:span>, etc.)</text:p>
          </table:table-cell>
        </table:table-row>
        <table:table-row>
          <table:table-cell table:style-name="SummaryTableDataCell">
            <text:p><text:span text:style-name="CodeChar">Translation/SimVarTranslator.cs</text:span>, <text:span text:style-name="CodeChar">TranslatedVar.cs</text:span></text:p>
          </table:table-cell>
          <table:table-cell table:style-name="SummaryTableDataCell">
            <text:p>Helpers for translating between raw SimConnect values and application units</text:p>
          </table:table-cell>
        </table:table-row>
      </table:table>
      <text:h text:outline-level="3" text:style-name="H2Style">Demo app program flow (<text:span text:style-name="CodeChar">SimConnectCrossPlatform.WinFormsApp</text:span>)</text:h>
      <text:p text:style-name="BodyStyle">1. <text:span text:style-name="BoldChar">Connect</text:span> button creates a <text:span text:style-name="CodeChar">ReconnectingSimInterface</text:span> with backoff/ heartbeat settings, wires its four events, registers three data definitions (<text:span text:style-name="CodeChar">FlightData</text:span>: altitude/airspeed/heading/VSI/ground speed/ lat/lon; <text:span text:style-name="CodeChar">EngineData</text:span>: RPM/throttle/fuel flow/fuel qty; <text:span text:style-name="CodeChar">AutopilotData</text:span>: AP master/heading/altitude/airspeed), requests all three once per second, and starts the background worker. 2. <text:span text:style-name="BoldChar">`Sim_DataReceived`</text:span> dispatches by request ID to <text:span text:style-name="CodeChar">UpdateFlightData</text:span>/<text:span text:style-name="CodeChar">UpdateEngineData</text:span>/<text:span text:style-name="CodeChar">UpdateAutopilotData</text:span>, which populate on-screen text boxes (this is a live telemetry viewer, not a panel driver). 3. Six buttons (<text:span text:style-name="CodeChar">btnParkBrake</text:span>, <text:span text:style-name="CodeChar">btnGear</text:span>, <text:span text:style-name="CodeChar">btnLandingLights</text:span>, <text:span text:style-name="CodeChar">btnNavLights</text:span>, <text:span text:style-name="CodeChar">btnBeacon</text:span>, <text:span text:style-name="CodeChar">btnStrobes</text:span>) call <text:span text:style-name="CodeChar">SendSimEvent(name)</text:span>, which transmits the named SimConnect event through the wrapped interface — a generic "send any named event" demo, not Jet-Ranger-specific commands. 4. <text:span text:style-name="BoldChar">Disconnect</text:span>/form-closing unwires events and stops the interface.</text:p>
      <text:h text:outline-level="3" text:style-name="H2Style">Local network configuration / IP addresses</text:h>
      <text:p text:style-name="BodyStyle">None. All communication is local SimConnect IPC to whichever sim is installed — there is no UDP/TCP traffic to the Arduino panel boards anywhere in this project.</text:p>
      <text:h text:outline-level="3" text:style-name="H2Style">Programs this communicates with</text:h>
      <text:list>
        <text:list-item>
          <text:p text:style-name="ListParaStyle"><text:span text:style-name="BoldChar">Microsoft Flight Simulator</text:span> or <text:span text:style-name="BoldChar">Prepar3D</text:span> (whichever's SimConnect DLL is found at runtime) — data source and event sink.</text:p>
        </text:list-item>
        <text:list-item>
          <text:p text:style-name="ListParaStyle">No Arduino boards and no other C# project in this repository consume its output — it is not currently plumbed into the Jet Ranger panel network. If it's intended as the eventual replacement for <text:span text:style-name="CodeChar">P3D_to_UDP</text:span>/<text:span text:style-name="CodeChar">SimConnect_to_UDP</text:span>/<text:span text:style-name="CodeChar">MSFSSimConnectExtractor</text:span>, that integration (adding the UDP send/receive logic those three apps have) hasn't been done yet.</text:p>
        </text:list-item>
      </text:list>
      <text:h text:outline-level="2" text:style-name="H1Style">V1 C# Projects — Program Summary</text:h>
      <text:p text:style-name="BodyStyle">A legacy folder (dated ~2014) of early, pre-Ethernet prototypes from before the current <text:span text:style-name="CodeChar">172.16.1.x</text:span> UDP panel network existed. Everything here talked to the Arduino boards over a plain <text:span text:style-name="BoldChar">serial COM port</text:span>, and to DCS World over its classic <text:span text:style-name="BoldChar">Export.lua / SIOC</text:span> integration rather than SimConnect/FSUIPC. Kept for historical reference; none of these are part of the current running system. Four sub-folders contain actual C# programs; two others (<text:span text:style-name="CodeChar">ArduinoMultiOLEDRx - 20140101</text:span> and <text:span text:style-name="CodeChar">soic</text:span>) contain an Arduino sketch and SIOC configuration files respectively, not C# code, and aren't covered below.</text:p>
      <text:h text:outline-level="3" text:style-name="H2Style">ArduinoSender (<text:span text:style-name="CodeChar">multioledreceiver/ArduinoSender</text:span>)</text:h>
      <text:p text:style-name="BodyStyle">WinForms app (<text:span text:style-name="CodeChar">WindowsFormsApplication1.Form1</text:span>). <text:span text:style-name="BoldChar">Button 1</text:span> opens a serial port and, in a tight blocking loop (<text:span text:style-name="CodeChar">Application.DoEvents()</text:span> + 50ms sleep), writes an <text:span text:style-name="CodeChar">STX &lt;oled#&gt; &lt;line#&gt; &lt;text&gt; ETX</text:span> framed message to two OLED displays (<text:span text:style-name="CodeChar">oled1</text:span>/<text:span text:style-name="CodeChar">oled2</text:span>) showing the current time — a manual demo of the serial OLED protocol later reused in <text:span text:style-name="CodeChar">JET_RANGER_RADIO_CONTROLLER</text:span>'s character-OLED code. <text:span text:style-name="BoldChar">Button 2</text:span> stops the loop and exits. No networking — serial only, port/settings configured via the WinForms designer.</text:p>
      <text:h text:outline-level="3" text:style-name="H2Style">ArdunioCLISender (<text:span text:style-name="CodeChar">multioledreceiver/ArdunioCLISender</text:span>)</text:h>
      <text:p text:style-name="BodyStyle">Console CLI tool combining serial + UDP. Opens <text:span text:style-name="CodeChar">COM7</text:span> at 115200 baud (with a manual COM-port prompt fallback), then a UDP listener on <text:span text:style-name="BoldChar">port 7781</text:span> that receives DCS World <text:span text:style-name="CodeChar">Export.lua</text:span>-style semicolon-delimited <text:span text:style-name="CodeChar">"tag=value;tag=value;..."</text:span> telemetry strings (paired LUA scripts live in <text:span text:style-name="CodeChar">ArdunioCLISender/LUA/</text:span>: <text:span text:style-name="CodeChar">soic_conv_BeforeNextFrame.lua</text:span>, <text:span text:style-name="CodeChar">soic_conv_ExportStart.lua</text:span>). Each incoming packet is SHA1-hashed to detect changes, then parsed for VHF/NAV/DME/autopilot/ADF tags (200–209) or CMSP/CMSC countermeasures text, and the changed fields are written to up to 7 serial-attached OLED displays framed the same way as <text:span text:style-name="CodeChar">ArduinoSender</text:span>. Supports <text:span text:style-name="CodeChar">debug</text:span> and <text:span text:style-name="CodeChar">time</text:span> command-line flags (the latter just cycles a clock display on all 7 OLEDs without waiting for DCS data).</text:p>
      <text:h text:outline-level="3" text:style-name="H2Style">ptdodoexport (<text:span text:style-name="CodeChar">ptdodoexport</text:span>)</text:h>
      <text:p text:style-name="BodyStyle">Minimal console poller that P/Invokes <text:span text:style-name="CodeChar">GetEngOutLightState()</text:span> out of <text:span text:style-name="CodeChar">DodoSim206FSXDataExport.dll</text:span> (the DodoSim Bell 206 add-on's own export DLL) every 500ms and prints the result to the console. A read-only diagnostic for checking the add-on's engine-out light state via its native DLL interface — no serial, no UDP.</text:p>
      <text:h text:outline-level="3" text:style-name="H2Style">udp_sender (<text:span text:style-name="CodeChar">udp sender</text:span>, namespace <text:span text:style-name="CodeChar">Soic_Conv_Output</text:span>)</text:h>
      <text:p text:style-name="BodyStyle">Console CLI meant to bridge <text:span text:style-name="BoldChar">SIOC</text:span> (Sim I/O Controller, used with Opencockpits-style hardware) and DCS World's <text:span text:style-name="CodeChar">Export.lua</text:span> telemetry via UDP, using the same paired LUA scripts as <text:span text:style-name="CodeChar">ArdunioCLISender</text:span>. As currently written, <text:span text:style-name="CodeChar">Main()</text:span> only runs a hard-coded self-test: it fires 41 UDP packets of the form <text:span text:style-name="CodeChar">"&lt;n&gt;=1:&lt;n-1&gt;=0:"</text:span> to <text:span text:style-name="CodeChar">127.0.0.1:7777</text:span> (100↦140), one every 200ms, and then returns — the real bridging logic lives in a separate <text:span text:style-name="CodeChar">Connect(server, message)</text:span> method (TCP to a local SIOC server on port <text:span text:style-name="BoldChar">8092</text:span>, then relaying UDP port <text:span text:style-name="BoldChar">7777</text:span> telemetry back to it as <text:span text:style-name="CodeChar">"Arn.Resp:&lt;data&gt;"</text:span>) that <text:span text:style-name="CodeChar">Main()</text:span> never actually calls, so in its current state this program only sends test data and doesn't perform the SIOC bridging it was written for.</text:p>
      <text:h text:outline-level="3" text:style-name="H2Style">Local network configuration</text:h>
      <table:table table:name="Table31" table:style-name="SummaryTable">
        <table:table-column table:style-name="SummaryTableCol"/>
        <table:table-column table:style-name="SummaryTableCol"/>
        <table:table-column table:style-name="SummaryTableCol"/>
        <table:table-row>
          <table:table-cell table:style-name="SummaryTableHeadCell">
            <text:p>Project</text:p>
          </table:table-cell>
          <table:table-cell table:style-name="SummaryTableHeadCell">
            <text:p>Local port</text:p>
          </table:table-cell>
          <table:table-cell table:style-name="SummaryTableHeadCell">
            <text:p>Purpose</text:p>
          </table:table-cell>
        </table:table-row>
        <table:table-row>
          <table:table-cell table:style-name="SummaryTableDataCell">
            <text:p>ArdunioCLISender</text:p>
          </table:table-cell>
          <table:table-cell table:style-name="SummaryTableDataCell">
            <text:p>7781 (UDP)</text:p>
          </table:table-cell>
          <table:table-cell table:style-name="SummaryTableDataCell">
            <text:p>Receives DCS <text:span text:style-name="CodeChar">Export.lua</text:span> telemetry</text:p>
          </table:table-cell>
        </table:table-row>
        <table:table-row>
          <table:table-cell table:style-name="SummaryTableDataCell">
            <text:p>udp_sender</text:p>
          </table:table-cell>
          <table:table-cell table:style-name="SummaryTableDataCell">
            <text:p>none bound (test loop only); <text:span text:style-name="CodeChar">Connect()</text:span> — unreachable — would bind 7777 (UDP)</text:p>
          </table:table-cell>
          <table:table-cell table:style-name="SummaryTableDataCell">
            <text:p>Would receive DCS <text:span text:style-name="CodeChar">Export.lua</text:span> telemetry for SIOC relay</text:p>
          </table:table-cell>
        </table:table-row>
      </table:table>
      <text:h text:outline-level="3" text:style-name="H2Style">Remote endpoints these talk to</text:h>
      <table:table table:name="Table32"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Project</text:p>
          </table:table-cell>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udp_sender</text:p>
          </table:table-cell>
          <table:table-cell table:style-name="SummaryTableDataCell">
            <text:p><text:span text:style-name="CodeChar">127.0.0.1</text:span> (loopback)</text:p>
          </table:table-cell>
          <table:table-cell table:style-name="SummaryTableDataCell">
            <text:p>7777 (UDP)</text:p>
          </table:table-cell>
          <table:table-cell table:style-name="SummaryTableDataCell">
            <text:p>Self-test packets (<text:span text:style-name="CodeChar">Main()</text:span>)</text:p>
          </table:table-cell>
        </table:table-row>
        <table:table-row>
          <table:table-cell table:style-name="SummaryTableDataCell">
            <text:p>udp_sender</text:p>
          </table:table-cell>
          <table:table-cell table:style-name="SummaryTableDataCell">
            <text:p><text:span text:style-name="CodeChar">Connect()</text:span>'s <text:span text:style-name="CodeChar">server</text:span> parameter</text:p>
          </table:table-cell>
          <table:table-cell table:style-name="SummaryTableDataCell">
            <text:p>8092 (TCP)</text:p>
          </table:table-cell>
          <table:table-cell table:style-name="SummaryTableDataCell">
            <text:p>SIOC server (unreachable code path)</text:p>
          </table:table-cell>
        </table:table-row>
      </table:table>
      <text:h text:outline-level="3" text:style-name="H2Style">Programs these communicate with</text:h>
      <text:list>
        <text:list-item>
          <text:p text:style-name="ListParaStyle"><text:span text:style-name="BoldChar">ArduinoSender</text:span> / <text:span text:style-name="BoldChar">ArdunioCLISender</text:span> → a <text:span text:style-name="BoldChar">serial-attached Arduino</text:span> running the old MultiOLED-receiver sketch (<text:span text:style-name="CodeChar">multioledreceiver/ArduinoReceiver/ArduinoMultiOLEDRx/ArduinoMultiOLEDRx.ino</text:span>, not part of the current fleet) — not any of the current <text:span text:style-name="CodeChar">172.16.1.x</text:span> boards.</text:p>
        </text:list-item>
        <text:list-item>
          <text:p text:style-name="ListParaStyle"><text:span text:style-name="BoldChar">ArdunioCLISender</text:span> / <text:span text:style-name="BoldChar">udp_sender</text:span> → <text:span text:style-name="BoldChar">DCS World</text:span>, via its <text:span text:style-name="CodeChar">Export.lua</text:span> scripting hook and the paired <text:span text:style-name="CodeChar">soic_conv_*.lua</text:span> scripts — not SimConnect/FSUIPC.</text:p>
        </text:list-item>
        <text:list-item>
          <text:p text:style-name="ListParaStyle"><text:span text:style-name="BoldChar">ptdodoexport</text:span> → the locally-installed <text:span text:style-name="BoldChar">DodoSim206FSXDataExport.dll</text:span> add-on — no other process.</text:p>
        </text:list-item>
        <text:list-item>
          <text:p text:style-name="ListParaStyle">None of these four programs talk to any project in the current <text:span text:style-name="CodeChar">172.16.1.x</text:span> fleet (Radio/Servo/Upper controllers, UDP_TO_HID) or to the current sim-bridge apps (<text:span text:style-name="CodeChar">P3D_to_UDP</text:span>/<text:span text:style-name="CodeChar">SimConnect_to_UDP</text:span>/ <text:span text:style-name="CodeChar">MSFSSimConnectExtractor</text:span>/<text:span text:style-name="CodeChar">FSUIPCWinformsAutoCS</text:span>).</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